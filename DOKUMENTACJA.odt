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05cm" fo:margin-left="-0.191cm" fo:margin-top="0cm" fo:margin-bottom="0cm" table:align="left" style:writing-mode="lr-tb"/>
    </style:style>
    <style:style style:name="Tabela1.A" style:family="table-column">
      <style:table-column-properties style:column-width="6.3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>
      <style:table-properties style:width="19.052cm" fo:margin-left="-0.191cm" fo:margin-top="0cm" fo:margin-bottom="0cm" table:align="left" style:writing-mode="lr-tb"/>
    </style:style>
    <style:style style:name="Tabela2.A" style:family="table-column">
      <style:table-column-properties style:column-width="4.76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Text_20_body">
      <style:paragraph-properties fo:margin-top="0cm" fo:margin-bottom="0cm" fo:line-height="100%"/>
    </style:style>
    <style:style style:name="P4" style:family="paragraph" style:parent-style-name="Heading_20_2">
      <style:paragraph-properties fo:margin-top="0cm" fo:margin-bottom="0cm" fo:line-height="100%"/>
    </style:style>
    <style:style style:name="P5" style:family="paragraph" style:parent-style-name="Heading_20_1" style:master-page-name="Standard">
      <style:paragraph-properties fo:margin-top="0cm" fo:margin-bottom="0cm" fo:line-height="100%" style:page-number="auto"/>
    </style:style>
    <style:style style:name="P6" style:family="paragraph" style:parent-style-name="Heading_20_3">
      <style:paragraph-properties fo:margin-top="0cm" fo:margin-bottom="0cm" fo:line-height="100%"/>
    </style:style>
    <style:style style:name="P7" style:family="paragraph" style:parent-style-name="Heading_20_4">
      <style:paragraph-properties fo:margin-top="0cm" fo:margin-bottom="0cm" fo:line-height="100%"/>
    </style:style>
    <style:style style:name="P8" style:family="paragraph" style:parent-style-name="List_20_Number">
      <style:paragraph-properties fo:margin-top="0cm" fo:margin-bottom="0cm" fo:line-height="100%"/>
    </style:style>
    <style:style style:name="P9" style:family="paragraph" style:parent-style-name="List_20_Bullet">
      <style:paragraph-properties fo:margin-top="0cm" fo:margin-bottom="0cm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fo:font-size="8.5pt" style:font-size-asian="8.5pt"/>
    </style:style>
    <style:style style:name="T3" style:family="text">
      <style:text-properties style:font-name="Consolas" fo:font-size="9.5pt" style:font-size-asian="9.5pt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4520654612311983" text:style-name="Outline">
        <text:list-item>
          <text:p text:style-name="P5">KrasnoLudki: Komprehensywna Dokumentacja Systemu</text:p>
        </text:list-item>
      </text:list>
      <text:p text:style-name="P1"/>
      <text:p text:style-name="P1"><text:span text:style-name="T1">Tytuł Projektu:</text:span> KrasnoLudki – System Automatycznej Optymalizacji Siły Roboczej i Wizualizacji</text:p>
      <text:p text:style-name="P1"/>
      <text:p text:style-name="P1"><text:span text:style-name="T1">Kurs:</text:span> AiSD II (Algorytmy i Struktury Danych II)</text:p>
      <text:p text:style-name="P1"/>
      <text:p text:style-name="P1"><text:span text:style-name="T1">Język:</text:span> C++ (Standard C++17)</text:p>
      <text:p text:style-name="P1"/>
      <text:p text:style-name="P1"><text:span text:style-name="T1">System Budowania:</text:span> CMake 3.14+</text:p>
      <text:p text:style-name="P1"/>
      <text:p text:style-name="P1"><text:span text:style-name="T1">Framework Graficzny:</text:span> Raylib</text:p>
      <text:p text:style-name="P1"/>
      <text:p text:style-name="P1"/>
      <text:p text:style-name="P1"/>
      <text:list xml:id="list37720597" text:continue-numbering="true" text:style-name="Outline">
        <text:list-item>
          <text:list>
            <text:list-item>
              <text:h text:style-name="P4" text:outline-level="2">Spis Treści</text:h>
            </text:list-item>
          </text:list>
        </text:list-item>
      </text:list>
      <text:p text:style-name="P1"/>
      <text:list xml:id="list37742867" text:continue-numbering="true" text:style-name="Outline">
        <text:list-item>
          <text:p text:style-name="P8">[Streszczenie Wykonawcze](#streszczenie-wykonawcze)</text:p>
        </text:list-item>
        <text:list-item>
          <text:p text:style-name="P8">[Architektura Systemu](#architektura-systemu)</text:p>
        </text:list-item>
        <text:list-item>
          <text:p text:style-name="P8">[Główne Struktury Danych](#główne-struktury-danych)</text:p>
        </text:list-item>
        <text:list-item>
          <text:p text:style-name="P8">[Algorytmy i Optymalizacja](#algorytmy-i-optymalizacja)</text:p>
        </text:list-item>
        <text:list-item>
          <text:p text:style-name="P8">[Specyfikacje Modułów](#specyfikacje-modułów)</text:p>
        </text:list-item>
        <text:list-item>
          <text:p text:style-name="P8">[Dokumentacja API](#dokumentacja-api)</text:p>
        </text:list-item>
        <text:list-item>
          <text:p text:style-name="P8">[Formalizacja Matematyczna](#formalizacja-matematyczna)</text:p>
        </text:list-item>
      </text:list>
      <text:p text:style-name="P1"/>
      <text:p text:style-name="P1"/>
      <text:p text:style-name="P1"/>
      <text:list xml:id="list37741422" text:continue-numbering="true" text:style-name="Outline">
        <text:list-item>
          <text:list>
            <text:list-item>
              <text:h text:style-name="P4" text:outline-level="2">Streszczenie Wykonawcze</text:h>
            </text:list-item>
          </text:list>
        </text:list-item>
      </text:list>
      <text:p text:style-name="P1"/>
      <text:p text:style-name="P1">KrasnoLudki to zintegrowany system zaprojektowany do rozwiązywania <text:span text:style-name="T1">Problemu Optymalnego Przydzielania Pracowników</text:span> dla fantazyjnego królestwa zamieszkałego przez karły (Krasnoludki/krasnale ogrodowe). System wykorzystuje zaawansowane algorytmy grafowe i geometrię obliczeniową do:</text:p>
      <text:p text:style-name="P1"/>
      <text:list xml:id="list37731989" text:continue-numbering="true" text:style-name="Outline">
        <text:list-item>
          <text:p text:style-name="P8"><text:span text:style-name="T1">Analizy danych geograficznych</text:span> reprezentujących miejsca pracy i lokalizacje mieszkalne</text:p>
        </text:list-item>
        <text:list-item>
          <text:p text:style-name="P8"><text:span text:style-name="T1">Konstruowania wypukłych otoczek</text:span> w celu identyfikacji lokalizacji granicznych</text:p>
        </text:list-item>
        <text:list-item>
          <text:p text:style-name="P8"><text:span text:style-name="T1">Optymalizacji przydziału siły roboczej</text:span> przy użyciu algorytmów minimalnego kosztu maksymalnego przepływu</text:p>
        </text:list-item>
        <text:list-item>
          <text:p text:style-name="P8"><text:span text:style-name="T1">Wizualizacji wyników</text:span> poprzez interaktywny interfejs graficzny z Raylib</text:p>
        </text:list-item>
      </text:list>
      <text:p text:style-name="P1"/>
      <text:list xml:id="list37729783" text:continue-numbering="true" text:style-name="Outline">
        <text:list-item>
          <text:list>
            <text:list-item>
              <text:list>
                <text:list-item>
                  <text:h text:style-name="P6" text:outline-level="3">Dziedzina Problemu</text:h>
                </text:list-item>
              </text:list>
            </text:list-item>
          </text:list>
        </text:list-item>
      </text:list>
      <text:p text:style-name="P1"/>
      <text:p text:style-name="P1">Dane:</text:p>
      <text:p text:style-name="P9">Zbiór n miejsc pracy, każde zlokalizowane w współrzędnych (x, y, z) i wyspecjalizowane w wydobyciu materiałów (6 typów)</text:p>
      <text:p text:style-name="P9">Każde miejsce pracy ma skończoną pojemność (maksymalna liczba pracowników)</text:p>
      <text:p text:style-name="P9">Zbiór m domów mieszkalnych, każdy zlokalizowany w współrzędnych i zamieszkany przez jednego pracownika</text:p>
      <text:p text:style-name="P9">Każdy pracownik ma preferowany typ materiału</text:p>
      <text:p text:style-name="P1"/>
      <text:p text:style-name="P1">Znaleźć:</text:p>
      <text:p text:style-name="P9">Przydzielenie pracowników do miejsc pracy, które minimalizuje całkowity koszt transportu</text:p>
      <text:p text:style-name="P9">Spełnienie ograniczeń pojemności dla wszystkich miejsc pracy</text:p>
      <text:p text:style-name="P9">Spełnienie warunku przydzielenia jeden-do-jedneg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7732095" text:continue-numbering="true" text:style-name="Outline">
        <text:list-item>
          <text:list>
            <text:list-item>
              <text:h text:style-name="P4" text:outline-level="2"><text:soft-page-break/>Architektura Systemu</text:h>
            </text:list-item>
          </text:list>
        </text:list-item>
      </text:list>
      <text:p text:style-name="P1"/>
      <text:list xml:id="list37714261" text:continue-numbering="true" text:style-name="Outline">
        <text:list-item>
          <text:list>
            <text:list-item>
              <text:list>
                <text:list-item>
                  <text:h text:style-name="P6" text:outline-level="3">Diagram Architektury Wysokiego Poziomu</text:h>
                </text:list-item>
              </text:list>
            </text:list-item>
          </text:list>
        </text:list-item>
      </text:list>
      <text:p text:style-name="P3"/>
      <text:p text:style-name="P1"><text:span text:style-name="T2">┌─────────────────────────────────────────────────────────────┐</text:span></text:p>
      <text:p text:style-name="P1"><text:span text:style-name="T2">│ <text:s text:c="20"/>Główna Pętla Aplikacji <text:s text:c="16"/>│</text:span></text:p>
      <text:p text:style-name="P1"><text:span text:style-name="T2">│ <text:s/>(render_and_graphics + StateManager) <text:s text:c="22"/>│</text:span></text:p>
      <text:p text:style-name="P1"><text:span text:style-name="T2">└──────────────────────┬──────────────────────────────────────┘</text:span></text:p>
      <text:p text:style-name="P1"><text:span text:style-name="T2"><text:s text:c="23"/>│</text:span></text:p>
      <text:p text:style-name="P1"><text:span text:style-name="T2"><text:s text:c="8"/>┌──────────────┼──────────────┐</text:span></text:p>
      <text:p text:style-name="P1"><text:span text:style-name="T2"><text:s text:c="8"/>▼ <text:s text:c="13"/>▼ <text:s text:c="13"/>▼</text:span></text:p>
      <text:p text:style-name="P1"><text:span text:style-name="T2"><text:s text:c="4"/>┌────────┐ <text:s/>┌────────┐ <text:s/>┌────────┐</text:span></text:p>
      <text:p text:style-name="P1"><text:span text:style-name="T2"><text:s text:c="4"/>│ Tytuł <text:s/>│ <text:s/>│Generuj │ <text:s/>│Wizuali- │</text:span></text:p>
      <text:p text:style-name="P1"><text:span text:style-name="T2"><text:s text:c="4"/>│ Stan <text:s text:c="2"/>│ <text:s/>│ Stan <text:s text:c="2"/>│ <text:s/>│ zacja <text:s text:c="2"/>│</text:span></text:p>
      <text:p text:style-name="P1"><text:span text:style-name="T2"><text:s text:c="4"/>└────────┘ <text:s/>└────────┘ <text:s/>└────────┘</text:span></text:p>
      <text:p text:style-name="P1"><text:span text:style-name="T2"><text:s text:c="8"/>│ <text:s text:c="9"/>│ <text:s text:c="12"/>│</text:span></text:p>
      <text:p text:style-name="P1"><text:span text:style-name="T2"><text:s text:c="8"/>└──────────┬─────────────┘</text:span></text:p>
      <text:p text:style-name="P1"><text:span text:style-name="T2"><text:s text:c="19"/>│</text:span></text:p>
      <text:p text:style-name="P1"><text:span text:style-name="T2"><text:s text:c="8"/>┌──────────▼──────────┐</text:span></text:p>
      <text:p text:style-name="P1"><text:span text:style-name="T2"><text:s text:c="8"/>│ <text:s text:c="2"/>Menedżer Stanów <text:s text:c="2"/>│</text:span></text:p>
      <text:p text:style-name="P1"><text:span text:style-name="T2"><text:s text:c="8"/>│ <text:s/>(Singleton) <text:s text:c="7"/>│</text:span></text:p>
      <text:p text:style-name="P1"><text:span text:style-name="T2"><text:s text:c="8"/>└─────────────────────┘</text:span></text:p>
      <text:p text:style-name="P1"><text:span text:style-name="T2"><text:s text:c="19"/>│</text:span></text:p>
      <text:p text:style-name="P1"><text:span text:style-name="T2"><text:s text:c="8"/>┌──────────▼──────────────┐</text:span></text:p>
      <text:p text:style-name="P1"><text:span text:style-name="T2"><text:s text:c="8"/>│ <text:s text:c="2"/>Renderowanie Gry <text:s text:c="5"/>│</text:span></text:p>
      <text:p text:style-name="P1"><text:span text:style-name="T2"><text:s text:c="8"/>│ <text:s/>- Grafika (Raylib) <text:s text:c="4"/>│</text:span></text:p>
      <text:p text:style-name="P1"><text:span text:style-name="T2"><text:s text:c="8"/>│ <text:s/>- Zarządzanie Dźwiękiem│</text:span></text:p>
      <text:p text:style-name="P1"><text:span text:style-name="T2"><text:s text:c="8"/>│ <text:s/>- Licznik FPS <text:s text:c="9"/>│</text:span></text:p>
      <text:p text:style-name="P1"><text:span text:style-name="T2"><text:s text:c="8"/>└─────────────────────────┘</text:span></text:p>
      <text:p text:style-name="P1"/>
      <text:list xml:id="list37724483" text:continue-numbering="true" text:style-name="Outline">
        <text:list-item>
          <text:list>
            <text:list-item>
              <text:list>
                <text:list-item>
                  <text:h text:style-name="P6" text:outline-level="3">Komponenty Główne</text:h>
                </text:list-item>
              </text:list>
            </text:list-item>
          </text:list>
        </text:list-item>
      </text:list>
      <text:p text:style-name="P1"/>
      <text:list xml:id="list377403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1. <text:span text:style-name="T1">Warstwa Danych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Country</text:span>: Główna struktura danych zawierająca wszystkie miejsca pracy i domy</text:p>
      <text:p text:style-name="P9"><text:span text:style-name="T1">DynamicArray</text:span>: Niestandardowa implementacja dynamicznej tablicy</text:p>
      <text:p text:style-name="P9"><text:span text:style-name="T1">Queue</text:span>: Struktura danych FIFO dla algorytmu SPFA</text:p>
      <text:p text:style-name="P9"><text:span text:style-name="T1">Stack</text:span>: Struktura danych LIFO do parsowania i przechodzenia</text:p>
      <text:p text:style-name="P1"/>
      <text:list xml:id="list377213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2. <text:span text:style-name="T1">Warstwa Obliczeń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GraphProcessing</text:span>: Wejście/wyjście pliku i parsowanie danych</text:p>
      <text:p text:style-name="P9"><text:span text:style-name="T1">Silnik Algorytmów Grafowych</text:span>: SPFA, Min-Cost Max-Flow</text:p>
      <text:p text:style-name="P9"><text:span text:style-name="T1">Geometria Obliczeniowa</text:span>: Konstruowanie wypukłej otoczki</text:p>
      <text:p text:style-name="P9"><text:span text:style-name="T1">Obliczanie Odległości</text:span>: Metryka odległości euklidesowej</text:p>
      <text:p text:style-name="P1"/>
      <text:list xml:id="list377288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3. <text:span text:style-name="T1">Warstwa Prezentacji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StateManager</text:span>: Automat stanów dla przepływu gry</text:p>
      <text:p text:style-name="P9"><text:span text:style-name="T1">GameState</text:span>: Abstrakcyjna baza dla stanów gry</text:p>
      <text:p text:style-name="P9"><text:span text:style-name="T1">UIHelpers</text:span>: Narzędzia renderowania UI</text:p>
      <text:p text:style-name="P9"><text:span text:style-name="T1">Visualization</text:span>: Projekcja współrzędnych 3D i renderowanie</text:p>
      <text:p text:style-name="P1"/>
      <text:list xml:id="list377292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4. <text:span text:style-name="T1">Narzędzia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SettingsManager</text:span>: Trwałość konfiguracji</text:p>
      <text:p text:style-name="P9"><text:span text:style-name="T1">Huffman Compression</text:span>: Narzędzia kompresji danych</text:p>
      <text:p text:style-name="P9"><text:span text:style-name="T1">Tabulator</text:span>: Formatowany output konsolow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7724234" text:continue-numbering="true" text:style-name="Outline">
        <text:list-item>
          <text:list>
            <text:list-item>
              <text:h text:style-name="P4" text:outline-level="2"><text:soft-page-break/>Główne Struktury Danych</text:h>
            </text:list-item>
          </text:list>
        </text:list-item>
      </text:list>
      <text:p text:style-name="P1"/>
      <text:list xml:id="list37736239" text:continue-numbering="true" text:style-name="Outline">
        <text:list-item>
          <text:list>
            <text:list-item>
              <text:list>
                <text:list-item>
                  <text:h text:style-name="P6" text:outline-level="3">1. DynamicArray&lt;T&gt;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Generyczny kontener tablicy dynamicznie zmienialnej</text:p>
      <text:p text:style-name="P1"/>
      <text:p text:style-name="P1"><text:span text:style-name="T1">Kluczowe Cechy:</text:span></text:p>
      <text:p text:style-name="P9">Implementacja oparta na szablonach</text:p>
      <text:p text:style-name="P9">Operacje dołączania/poprzedzania O(1) amortyzowane</text:p>
      <text:p text:style-name="P9">Operacje usuwania O(n)</text:p>
      <text:p text:style-name="P9">Obsługa semantyki kopiowania i przenoszenia</text:p>
      <text:p text:style-name="P1"/>
      <text:p text:style-name="P1"><text:span text:style-name="T1">Struktura Wewnętrzna:</text:span></text:p>
      <text:p text:style-name="P1"><text:span text:style-name="T2">template &lt;typename T&gt;</text:span></text:p>
      <text:p text:style-name="P1"><text:span text:style-name="T2">class dynamicArray {</text:span></text:p>
      <text:p text:style-name="P1"><text:span text:style-name="T2"><text:s text:c="4"/>T* array; <text:s text:c="10"/>// Przechowywanie</text:span></text:p>
      <text:p text:style-name="P1"><text:span text:style-name="T2"><text:s text:c="4"/>int64_t size; <text:s text:c="6"/>// Bieżąca pojemność</text:span></text:p>
      <text:p text:style-name="P1"><text:span text:style-name="T2"><text:s text:c="4"/>int64_t lastIndex; <text:s/>// Ostatni prawidłowy indeks (size-1)</text:span></text:p>
      <text:p text:style-name="P1"><text:span text:style-name="T2">};</text:span></text:p>
      <text:p text:style-name="P1"/>
      <text:p text:style-name="P1"><text:span text:style-name="T1">Analiza Złożoności Czasowej:</text:span></text:p>
      <text:p text:style-name="P1"/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2"><text:span text:style-name="T1">Operacja</text:span></text:p>
          </table:table-cell>
          <table:table-cell table:style-name="Tabela1.A1" office:value-type="string">
            <text:p text:style-name="P2"><text:span text:style-name="T1">Czas</text:span></text:p>
          </table:table-cell>
          <table:table-cell table:style-name="Tabela1.A1" office:value-type="string">
            <text:p text:style-name="P2"><text:span text:style-name="T1">Przestrzeń</text:span></text:p>
          </table:table-cell>
        </table:table-row>
        <table:table-row table:style-name="Tabela1.1">
          <table:table-cell table:style-name="Tabela1.A1" office:value-type="string">
            <text:p text:style-name="P1">Dostęp `[]`</text:p>
          </table:table-cell>
          <table:table-cell table:style-name="Tabela1.A1" office:value-type="string">
            <text:p text:style-name="P1">O(1)</text:p>
          </table:table-cell>
          <table:table-cell table:style-name="Tabela1.A1" office:value-type="string">
            <text:p text:style-name="P1">O(1)</text:p>
          </table:table-cell>
        </table:table-row>
        <table:table-row table:style-name="Tabela1.1">
          <table:table-cell table:style-name="Tabela1.A1" office:value-type="string">
            <text:p text:style-name="P1">Dołącz</text:p>
          </table:table-cell>
          <table:table-cell table:style-name="Tabela1.A1" office:value-type="string">
            <text:p text:style-name="P1">O(1) amortyzowane</text:p>
          </table:table-cell>
          <table:table-cell table:style-name="Tabela1.A1" office:value-type="string">
            <text:p text:style-name="P1">O(1)</text:p>
          </table:table-cell>
        </table:table-row>
        <table:table-row table:style-name="Tabela1.1">
          <table:table-cell table:style-name="Tabela1.A1" office:value-type="string">
            <text:p text:style-name="P1">Wstaw w indeks</text:p>
          </table:table-cell>
          <table:table-cell table:style-name="Tabela1.A1" office:value-type="string">
            <text:p text:style-name="P1">O(n)</text:p>
          </table:table-cell>
          <table:table-cell table:style-name="Tabela1.A1" office:value-type="string">
            <text:p text:style-name="P1">O(1)</text:p>
          </table:table-cell>
        </table:table-row>
        <table:table-row table:style-name="Tabela1.1">
          <table:table-cell table:style-name="Tabela1.A1" office:value-type="string">
            <text:p text:style-name="P1">Usuń</text:p>
          </table:table-cell>
          <table:table-cell table:style-name="Tabela1.A1" office:value-type="string">
            <text:p text:style-name="P1">O(n)</text:p>
          </table:table-cell>
          <table:table-cell table:style-name="Tabela1.A1" office:value-type="string">
            <text:p text:style-name="P1">O(1)</text:p>
          </table:table-cell>
        </table:table-row>
        <table:table-row table:style-name="Tabela1.1">
          <table:table-cell table:style-name="Tabela1.A1" office:value-type="string">
            <text:p text:style-name="P1">Wyczyść</text:p>
          </table:table-cell>
          <table:table-cell table:style-name="Tabela1.A1" office:value-type="string">
            <text:p text:style-name="P1">O(1)</text:p>
          </table:table-cell>
          <table:table-cell table:style-name="Tabela1.A1" office:value-type="string">
            <text:p text:style-name="P1">O(n)</text:p>
          </table:table-cell>
        </table:table-row>
      </table:table>
      <text:p text:style-name="P1"/>
      <text:p text:style-name="P1"><text:span text:style-name="T1">Strategia Wzrostu Pamięci:</text:span> Strategia podwajania przy przepełnieniu pojemności (size → 2×size)</text:p>
      <text:p text:style-name="P1"/>
      <text:list xml:id="list37736486" text:continue-numbering="true" text:style-name="Outline">
        <text:list-item>
          <text:list>
            <text:list-item>
              <text:list>
                <text:list-item>
                  <text:h text:style-name="P6" text:outline-level="3">2. Couple&lt;ValueA, ValueB&gt;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Heterogenny kontener pary do przechowywania krotek (typ_materiału, indeks)</text:p>
      <text:p text:style-name="P1"><text:span text:style-name="T2">template &lt;typename A, typename B&gt;</text:span></text:p>
      <text:p text:style-name="P1"><text:span text:style-name="T2">struct couple {</text:span></text:p>
      <text:p text:style-name="P1"><text:span text:style-name="T2"><text:s text:c="4"/>A valueA;</text:span></text:p>
      <text:p text:style-name="P1"><text:span text:style-name="T2"><text:s text:c="4"/>B valueB;</text:span></text:p>
      <text:p text:style-name="P1"><text:span text:style-name="T2">};</text:span></text:p>
      <text:p text:style-name="P1"/>
      <text:p text:style-name="P1"><text:span text:style-name="T1">Użycie w Country:</text:span></text:p>
      <text:p text:style-name="P1"><text:span text:style-name="T2">// Aktywne miejsca pracy reprezentowane jako (typ_materiału, indeks_miejsca_pracy)</text:span></text:p>
      <text:p text:style-name="P1"><text:span text:style-name="T2">couple&lt;namedValues::material, int64_t&gt; active_location;</text:span></text:p>
      <text:p text:style-name="P1"/>
      <text:list xml:id="list37726630" text:continue-numbering="true" text:style-name="Outline">
        <text:list-item>
          <text:list>
            <text:list-item>
              <text:list>
                <text:list-item>
                  <text:h text:style-name="P6" text:outline-level="3">3. Queue&lt;T&gt;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Kolejka FIFO do przechodzenia w porządku wszerz w algorytmie SPFA</text:p>
      <text:p text:style-name="P1"/>
      <text:p text:style-name="P1"><text:span text:style-name="T1">Operacje:</text:span></text:p>
      <text:p text:style-name="P9"><text:span text:style-name="T3">append(value)</text:span>: Enqueue - O(1)</text:p>
      <text:p text:style-name="P9"><text:span text:style-name="T3">dequeue()</text:span>: Dequeue - O(1)</text:p>
      <text:p text:style-name="P9"><text:span text:style-name="T3">isEmpty()</text:span>: Sprawdzenie pustości - O(1)</text:p>
      <text:p text:style-name="P9"><text:span text:style-name="T3">getHead()</text:span>: Dostęp do przodu - O(1)</text:p>
      <text:p text:style-name="P1"/>
      <text:p text:style-name="P1"><text:span text:style-name="T1">Struktura Węzła:</text:span></text:p>
      <text:p text:style-name="P1"><text:span text:style-name="T2">template &lt;typename T&gt;</text:span></text:p>
      <text:p text:style-name="P1"><text:span text:style-name="T2">struct node {</text:span></text:p>
      <text:p text:style-name="P1"><text:span text:style-name="T2"><text:s text:c="4"/>T val;</text:span></text:p>
      <text:p text:style-name="P1"><text:span text:style-name="T2"><text:s text:c="4"/>node&lt;T&gt;* next;</text:span></text:p>
      <text:p text:style-name="P1"><text:span text:style-name="T2">};</text:span></text:p>
      <text:p text:style-name="P1"/>
      <text:list xml:id="list37730474" text:continue-numbering="true" text:style-name="Outline">
        <text:list-item>
          <text:list>
            <text:list-item>
              <text:list>
                <text:list-item>
                  <text:h text:style-name="P6" text:outline-level="3"><text:soft-page-break/>4. Country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Główny kontener dla wszystkich danych geograficznych i miejsc pracy</text:p>
      <text:p text:style-name="P1"/>
      <text:p text:style-name="P1"><text:span text:style-name="T1">Organizacja Danych:</text:span></text:p>
      <text:p text:style-name="P1"><text:span text:style-name="T2">class country {</text:span></text:p>
      <text:p text:style-name="P1"><text:span text:style-name="T2"><text:s text:c="4"/>// Zorganizowane po typach materiałów (6 typów: breadOre, wood, clay, metal, gems, gardenGnomes)</text:span></text:p>
      <text:p text:style-name="P1"><text:span text:style-name="T2"><text:s text:c="4"/>dynamicArray&lt;dynamicArray&lt;unique_ptr&lt;workplace&gt;&gt;&gt; workplaces;</text:span></text:p>
      <text:p text:style-name="P1"><text:span text:style-name="T2"><text:s text:c="4"/>dynamicArray&lt;dynamicArray&lt;unique_ptr&lt;house&gt;&gt;&gt; houses;</text:span></text:p>
      <text:p text:style-name="P1"/>
      <text:p text:style-name="P1"><text:span text:style-name="T2"><text:s text:c="4"/>// Wewnętrzna reprezentacja grafu do optymalizacji</text:span></text:p>
      <text:p text:style-name="P1"><text:span text:style-name="T2"><text:s text:c="4"/>struct edge {</text:span></text:p>
      <text:p text:style-name="P1"><text:span text:style-name="T2"><text:s text:c="8"/>int64_t to; <text:s text:c="9"/>// Wierzchołek docelowy</text:span></text:p>
      <text:p text:style-name="P1"><text:span text:style-name="T2"><text:s text:c="8"/>int64_t rev; <text:s text:c="8"/>// Indeks krawędzi odwrotnej (dla grafu rezidualnego)</text:span></text:p>
      <text:p text:style-name="P1"><text:span text:style-name="T2"><text:s text:c="8"/>int64_t capacity; <text:s text:c="3"/>// Pozostała pojemność</text:span></text:p>
      <text:p text:style-name="P1"><text:span text:style-name="T2"><text:s text:c="8"/>double cost; <text:s text:c="8"/>// Koszt jednostkowy</text:span></text:p>
      <text:p text:style-name="P1"><text:span text:style-name="T2"><text:s text:c="4"/>};</text:span></text:p>
      <text:p text:style-name="P1"><text:span text:style-name="T2">};</text:span></text:p>
      <text:p text:style-name="P1"/>
      <text:p text:style-name="P1"><text:span text:style-name="T1">Strategia Indeksowania:</text:span></text:p>
      <text:p text:style-name="P9">Indeks główny: typ materiału (0-5)</text:p>
      <text:p text:style-name="P9">Indeks wtórny: indeks jednostki w obrębie typu materiału</text:p>
      <text:p text:style-name="P9">Dostęp: O(1) zarówno dla miejsc pracy jak i domów</text:p>
      <text:p text:style-name="P1"/>
      <text:p text:style-name="P1"/>
      <text:list xml:id="list37742570" text:continue-numbering="true" text:style-name="Outline">
        <text:list-item>
          <text:list>
            <text:list-item>
              <text:h text:style-name="P4" text:outline-level="2">Algorytmy i Optymalizacja</text:h>
            </text:list-item>
          </text:list>
        </text:list-item>
      </text:list>
      <text:p text:style-name="P1"/>
      <text:list xml:id="list37714280" text:continue-numbering="true" text:style-name="Outline">
        <text:list-item>
          <text:list>
            <text:list-item>
              <text:list>
                <text:list-item>
                  <text:h text:style-name="P6" text:outline-level="3">1. Algorytm Szybkiej Ścieżki Najkrótszej (SPFA)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Znaleźć ścieżkę o minimalnym koszcie w grafie skierowanym z nieujemnymi kosztami</text:p>
      <text:p text:style-name="P1"/>
      <text:p text:style-name="P1"><text:span text:style-name="T1">Opis Algorytmu:</text:span></text:p>
      <text:p text:style-name="P1"><text:span text:style-name="T2">SPFA(graf, źródło, ujście):</text:span></text:p>
      <text:p text:style-name="P1"><text:span text:style-name="T2"><text:s text:c="4"/>dist[źródło] = 0</text:span></text:p>
      <text:p text:style-name="P1"><text:span text:style-name="T2"><text:s text:c="4"/>dist[v] = ∞ dla wszystkich v ≠ źródło</text:span></text:p>
      <text:p text:style-name="P1"><text:span text:style-name="T2"><text:s text:c="4"/>kolejka Q = {źródło}</text:span></text:p>
      <text:p text:style-name="P1"><text:span text:style-name="T2"><text:s text:c="4"/>inQueue[źródło] = true</text:span></text:p>
      <text:p text:style-name="P1"/>
      <text:p text:style-name="P1"><text:span text:style-name="T2"><text:s text:c="4"/>while Q jest niepuste:</text:span></text:p>
      <text:p text:style-name="P1"><text:span text:style-name="T2"><text:s text:c="8"/>v = Q.dequeue()</text:span></text:p>
      <text:p text:style-name="P1"><text:span text:style-name="T2"><text:s text:c="8"/>inQueue[v] = false</text:span></text:p>
      <text:p text:style-name="P1"/>
      <text:p text:style-name="P1"><text:span text:style-name="T2"><text:s text:c="8"/>dla każdej krawędzi (v, u) z pojemnością &gt; 0:</text:span></text:p>
      <text:p text:style-name="P1"><text:span text:style-name="T2"><text:s text:c="12"/>jeśli dist[v] + koszt(v,u) &lt; dist[u]:</text:span></text:p>
      <text:p text:style-name="P1"><text:span text:style-name="T2"><text:s text:c="16"/>dist[u] = dist[v] + koszt(v,u)</text:span></text:p>
      <text:p text:style-name="P1"><text:span text:style-name="T2"><text:s text:c="16"/>parent[u] = v</text:span></text:p>
      <text:p text:style-name="P1"><text:span text:style-name="T2"><text:s text:c="16"/>jeśli u nie jest w Q:</text:span></text:p>
      <text:p text:style-name="P1"><text:span text:style-name="T2"><text:s text:c="20"/>Q.enqueue(u)</text:span></text:p>
      <text:p text:style-name="P1"><text:span text:style-name="T2"><text:s text:c="20"/>inQueue[u] = true</text:span></text:p>
      <text:p text:style-name="P1"/>
      <text:p text:style-name="P1"><text:span text:style-name="T2"><text:s text:c="4"/>zwróć parent[ujście] ≠ -1 <text:s/>// Ścieżka istnieje</text:span></text:p>
      <text:p text:style-name="P1"/>
      <text:p text:style-name="P1"><text:span text:style-name="T1">Lokalizacja Implementacji:</text:span> <text:span text:style-name="T3">country::spfa()</text:span> w DataStructures/country.cpp (linie 237-285)</text:p>
      <text:p text:style-name="P1"/>
      <text:p text:style-name="P1"><text:span text:style-name="T1">Złożoność Czasowa:</text:span></text:p>
      <text:p text:style-name="P9">Przypadek najlepszy: O(V + E) bez cykli ujemnych</text:p>
      <text:p text:style-name="P9">Przypadek średni: O(VE) w typowych warunkach</text:p>
      <text:p text:style-name="P9">Liczba wierzchołków V = źródło + |domy| + |miejsca_pracy| + ujście</text:p>
      <text:p text:style-name="P9">Liczba krawędzi E = |domy| + |domy|×|miejsca<text:span text:style-name="T4">pracy| + |miejsca</text:span>pracy|</text:p>
      <text:p text:style-name="P1"/>
      <text:p text:style-name="P1"><text:span text:style-name="T1">Złożoność Przestrzeni:</text:span> O(V + E) dla przechowywania grafu i tablic pomocniczych</text:p>
      <text:p text:style-name="P1"/>
      <text:p text:style-name="P1"><text:span text:style-name="T1">Gwarancja Poprawności:</text:span> Zwraca true wtedy i tylko wtedy, gdy istnieje ścieżka powiększająca ze źródła do ujścia</text:p>
      <text:p text:style-name="P1"><text:soft-page-break/></text:p>
      <text:list xml:id="list37718893" text:continue-numbering="true" text:style-name="Outline">
        <text:list-item>
          <text:list>
            <text:list-item>
              <text:list>
                <text:list-item>
                  <text:h text:style-name="P6" text:outline-level="3">2. Algorytm Minimalnego Kosztu Maksymalnego Przepływu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Znaleźć przydzielenie maksymalnego przepływu z minimalnym całkowitym kosztem</text:p>
      <text:p text:style-name="P1"/>
      <text:p text:style-name="P1"><text:span text:style-name="T1">Formułowanie Matematyczne:</text:span></text:p>
      <text:p text:style-name="P1"><text:span text:style-name="T2">Minimalizuj: Σ(przepływ(e) × koszt(e)) dla wszystkich krawędzi e</text:span></text:p>
      <text:p text:style-name="P1"><text:span text:style-name="T2">Pod warunkiem:</text:span></text:p>
      <text:p text:style-name="P1"><text:span text:style-name="T2"><text:s text:c="4"/>- Zachowanie przepływu: Σ(przepływ_wchodzący) = Σ(przepływ_wychodzący) dla wszystkich wierzchołków pośrednich</text:span></text:p>
      <text:p text:style-name="P1"><text:span text:style-name="T2"><text:s text:c="4"/>- Ograniczenia pojemności: 0 ≤ przepływ(e) ≤ pojemność(e)</text:span></text:p>
      <text:p text:style-name="P1"><text:span text:style-name="T2"><text:s text:c="4"/>- Ograniczenie źródła: całkowity_przepływ_wychodzący(źródło) = całkowite_zapotrzebowanie</text:span></text:p>
      <text:p text:style-name="P1"><text:span text:style-name="T2"><text:s text:c="4"/>- Ograniczenie ujścia: całkowity_przepływ_wchodzący(ujście) = całkowite_zapotrzebowanie</text:span></text:p>
      <text:p text:style-name="P1"/>
      <text:p text:style-name="P1"><text:span text:style-name="T1">Algorytm (Successive Shortest Paths):</text:span></text:p>
      <text:p text:style-name="P1"><text:span text:style-name="T2">MIN_COST_MAX_FLOW(graf, źródło, ujście):</text:span></text:p>
      <text:p text:style-name="P1"><text:span text:style-name="T2"><text:s text:c="4"/>całkowityKoszt = 0</text:span></text:p>
      <text:p text:style-name="P1"><text:span text:style-name="T2"><text:s text:c="4"/>grafRezidualny = graf</text:span></text:p>
      <text:p text:style-name="P1"/>
      <text:p text:style-name="P1"><text:span text:style-name="T2"><text:s text:c="4"/>while SPFA(grafRezidualny, źródło, ujście, parent):</text:span></text:p>
      <text:p text:style-name="P1"><text:span text:style-name="T2"><text:s text:c="8"/>// Znaleźć pojemność wąskiego gardła</text:span></text:p>
      <text:p text:style-name="P1"><text:span text:style-name="T2"><text:s text:c="8"/>przepływ = ∞</text:span></text:p>
      <text:p text:style-name="P1"><text:span text:style-name="T2"><text:s text:c="8"/>dla v na ścieżce(ujście do źródła):</text:span></text:p>
      <text:p text:style-name="P1"><text:span text:style-name="T2"><text:s text:c="12"/>przepływ = min(przepływ, pojemność(v))</text:span></text:p>
      <text:p text:style-name="P1"/>
      <text:p text:style-name="P1"><text:span text:style-name="T2"><text:s text:c="8"/>// Powiększyć przepływ wzdłuż ścieżki</text:span></text:p>
      <text:p text:style-name="P1"><text:span text:style-name="T2"><text:s text:c="8"/>dla v na ścieżce(ujście do źródła):</text:span></text:p>
      <text:p text:style-name="P1"><text:span text:style-name="T2"><text:s text:c="12"/>e = krawędź(parent[v], v)</text:span></text:p>
      <text:p text:style-name="P1"><text:span text:style-name="T2"><text:s text:c="12"/>pojemność(e) -= przepływ</text:span></text:p>
      <text:p text:style-name="P1"><text:span text:style-name="T2"><text:s text:c="12"/>pojemność(odwrotna(e)) += przepływ</text:span></text:p>
      <text:p text:style-name="P1"><text:span text:style-name="T2"><text:s text:c="12"/>całkowityKoszt += przepływ × koszt(e)</text:span></text:p>
      <text:p text:style-name="P1"/>
      <text:p text:style-name="P1"><text:span text:style-name="T2"><text:s text:c="4"/>zwróć całkowityKoszt</text:span></text:p>
      <text:p text:style-name="P1"/>
      <text:p text:style-name="P1"><text:span text:style-name="T1">Lokalizacja Implementacji:</text:span> <text:span text:style-name="T3">country::minCostMaxFlow()</text:span> (linie 287-315)</text:p>
      <text:p text:style-name="P1"/>
      <text:p text:style-name="P1"><text:span text:style-name="T1">Złożoność Iteracji:</text:span> O(K × czas<text:span text:style-name="T4">SPFA) gdzie K = całkowity</text:span>wymagany_przepływ</text:p>
      <text:p text:style-name="P1"/>
      <text:p text:style-name="P1"><text:span text:style-name="T1">Przykładowa Konstrukcja Sieci:</text:span></text:p>
      <text:p text:style-name="P1"/>
      <text:p text:style-name="P1">Dla typu materiału z H domami i W miejscami pracy:</text:p>
      <text:p text:style-name="P1"><text:span text:style-name="T2">Wierzchołki Grafu:</text:span></text:p>
      <text:p text:style-name="P1"><text:span text:style-name="T2"><text:s text:c="4"/>- źródło (0)</text:span></text:p>
      <text:p text:style-name="P1"><text:span text:style-name="T2"><text:s text:c="4"/>- domy (1 do H)</text:span></text:p>
      <text:p text:style-name="P1"><text:span text:style-name="T2"><text:s text:c="4"/>- miejsca pracy (H+1 do H+W)</text:span></text:p>
      <text:p text:style-name="P1"><text:span text:style-name="T2"><text:s text:c="4"/>- ujście (H+W+1)</text:span></text:p>
      <text:p text:style-name="P1"/>
      <text:p text:style-name="P1"><text:span text:style-name="T2">Krawędzie:</text:span></text:p>
      <text:p text:style-name="P1"><text:span text:style-name="T2"><text:s text:c="4"/>- źródło → dom_i: pojemność=1, koszt=0</text:span></text:p>
      <text:p text:style-name="P1"><text:span text:style-name="T2"><text:s text:c="4"/>- dom_i → miejsce_pracy_j: pojemność=1, koszt=odległość(dom_i, miejsce_pracy_j)</text:span></text:p>
      <text:p text:style-name="P1"><text:span text:style-name="T2"><text:s text:c="4"/>- miejsce_pracy_j → ujście: pojemność=pojemność_j, koszt=0</text:span></text:p>
      <text:p text:style-name="P1"/>
      <text:p text:style-name="P1"><text:span text:style-name="T1">Właściwość Poprawności:</text:span> Zwraca optymalne przydzielenie minimalizujące całkowity koszt przy respektowaniu wszystkich ograniczeń</text:p>
      <text:p text:style-name="P1"/>
      <text:list xml:id="list37737815" text:continue-numbering="true" text:style-name="Outline">
        <text:list-item>
          <text:list>
            <text:list-item>
              <text:list>
                <text:list-item>
                  <text:h text:style-name="P6" text:outline-level="3">3. Algorytm Wypukłej Otoczki (Wariant Graham Scan)</text:h>
                </text:list-item>
              </text:list>
            </text:list-item>
          </text:list>
        </text:list-item>
      </text:list>
      <text:p text:style-name="P1"/>
      <text:p text:style-name="P1"><text:span text:style-name="T1">Cel:</text:span> Identyfikacja miejsc pracy na granicy tworzących wypukłą otoczkę</text:p>
      <text:p text:style-name="P1"/>
      <text:p text:style-name="P1"><text:span text:style-name="T1">Opis Algorytmu:</text:span></text:p>
      <text:p text:style-name="P1"><text:span text:style-name="T2">CONVEX_HULL(punkty):</text:span></text:p>
      <text:p text:style-name="P1"><text:span text:style-name="T2"><text:s text:c="4"/>// Krok 1: Znaleźć punkt startowy (najniższy y, następnie najniższy x)</text:span></text:p>
      <text:p text:style-name="P1"><text:span text:style-name="T2"><text:s text:c="4"/>p0 = findStartingPoint(punkty)</text:span></text:p>
      <text:p text:style-name="P1"/>
      <text:p text:style-name="P1"><text:span text:style-name="T2"><text:s text:c="4"/>// Krok 2: Posortować punkty po kącie polarnym względem p0</text:span></text:p>
      <text:p text:style-name="P1"><text:span text:style-name="T2"><text:s text:c="4"/>sortedPoints = sortByPolarAngle(punkty, p0)</text:span></text:p>
      <text:p text:style-name="P1"><text:soft-page-break/><text:span text:style-name="T2"><text:s text:c="4"/>sortedPoints.swap(0, index_p0)</text:span></text:p>
      <text:p text:style-name="P1"/>
      <text:p text:style-name="P1"><text:span text:style-name="T2"><text:s text:c="4"/>// Krok 3: Konstruować otoczkę za pomocą testu iloczynu wektorowego</text:span></text:p>
      <text:p text:style-name="P1"><text:span text:style-name="T2"><text:s text:c="4"/>otoczka = {sortedPoints[0], sortedPoints[1]}</text:span></text:p>
      <text:p text:style-name="P1"/>
      <text:p text:style-name="P1"><text:span text:style-name="T2"><text:s text:c="4"/>dla i = 2 do n:</text:span></text:p>
      <text:p text:style-name="P1"><text:span text:style-name="T2"><text:s text:c="8"/>while otoczka.size() &gt;= 2:</text:span></text:p>
      <text:p text:style-name="P1"><text:span text:style-name="T2"><text:s text:c="12"/>p_next = sortedPoints[i]</text:span></text:p>
      <text:p text:style-name="P1"><text:span text:style-name="T2"><text:s text:c="12"/>p_top = otoczka.back()</text:span></text:p>
      <text:p text:style-name="P1"><text:span text:style-name="T2"><text:s text:c="12"/>p_prev = otoczka[otoczka.size()-2]</text:span></text:p>
      <text:p text:style-name="P1"/>
      <text:p text:style-name="P1"><text:span text:style-name="T2"><text:s text:c="12"/>jeśli determinant(p_prev, p_top, p_next) ≤ 0:</text:span></text:p>
      <text:p text:style-name="P1"><text:span text:style-name="T2"><text:s text:c="16"/>otoczka.pop()</text:span></text:p>
      <text:p text:style-name="P1"><text:span text:style-name="T2"><text:s text:c="12"/>else:</text:span></text:p>
      <text:p text:style-name="P1"><text:span text:style-name="T2"><text:s text:c="16"/>break</text:span></text:p>
      <text:p text:style-name="P1"/>
      <text:p text:style-name="P1"><text:span text:style-name="T2"><text:s text:c="8"/>otoczka.append(p_next)</text:span></text:p>
      <text:p text:style-name="P1"/>
      <text:p text:style-name="P1"><text:span text:style-name="T2"><text:s text:c="4"/>zwróć otoczka</text:span></text:p>
      <text:p text:style-name="P1"/>
      <text:p text:style-name="P1"><text:span text:style-name="T1">Funkcja Determinanty (Iloczyn Wektorowy):</text:span></text:p>
      <text:p text:style-name="P1"><text:span text:style-name="T2">double det(couple p0, couple pi, couple pj) {</text:span></text:p>
      <text:p text:style-name="P1"><text:span text:style-name="T2"><text:s text:c="4"/>zwróć (p_i.x - p_0.x) × (p_j.y - p_0.y)</text:span></text:p>
      <text:p text:style-name="P1"><text:span text:style-name="T2"><text:s text:c="9"/>- (p_j.x - p_0.x) × (p_i.y - p_0.y)</text:span></text:p>
      <text:p text:style-name="P1"><text:span text:style-name="T2">}</text:span></text:p>
      <text:p text:style-name="P1"/>
      <text:p text:style-name="P1"><text:span text:style-name="T1">Lokalizacja Implementacji:</text:span> <text:span text:style-name="T3">country::constructRimAroundCountry()</text:span> (linie 171-211)</text:p>
      <text:p text:style-name="P1"/>
      <text:p text:style-name="P1"><text:span text:style-name="T1">Złożoność Czasowa:</text:span> O(n log n) dla sortowania + O(n) dla konstrukcji otoczki = <text:span text:style-name="T1">O(n log n)</text:span></text:p>
      <text:p text:style-name="P1"/>
      <text:p text:style-name="P1"><text:span text:style-name="T1">Złożoność Przestrzeni:</text:span> O(n) dla wyjściowej otoczki</text:p>
      <text:p text:style-name="P1"/>
      <text:p text:style-name="P1"><text:span text:style-name="T1">Właściwość Poprawności:</text:span> Zwraca minimalny wielokąt wypukły obejmujący wszystkie aktywne miejsca pracy. Każdy punkt pojawia się dokładnie raz w wyjściu.</text:p>
      <text:p text:style-name="P1"/>
      <text:p text:style-name="P1"/>
      <text:p text:style-name="P1"/>
      <text:list xml:id="list37731693" text:continue-numbering="true" text:style-name="Outline">
        <text:list-item>
          <text:list>
            <text:list-item>
              <text:h text:style-name="P4" text:outline-level="2">Specyfikacje Modułów</text:h>
            </text:list-item>
          </text:list>
        </text:list-item>
      </text:list>
      <text:p text:style-name="P1"/>
      <text:list xml:id="list37724850" text:continue-numbering="true" text:style-name="Outline">
        <text:list-item>
          <text:list>
            <text:list-item>
              <text:list>
                <text:list-item>
                  <text:h text:style-name="P6" text:outline-level="3">Moduł 1: Wejście Danych &amp; Parsowanie</text:h>
                </text:list-item>
              </text:list>
            </text:list-item>
          </text:list>
        </text:list-item>
      </text:list>
      <text:p text:style-name="P1"/>
      <text:p text:style-name="P1"><text:span text:style-name="T1">Plik:</text:span> <text:span text:style-name="T3">src/backend/GraphProcessing.h</text:span></text:p>
      <text:p text:style-name="P1"/>
      <text:p text:style-name="P1"><text:span text:style-name="T1">Odpowiedzialność:</text:span> Parsowanie formatu pliku i walidacja danych</text:p>
      <text:p text:style-name="P1"/>
      <text:p text:style-name="P1"><text:span text:style-name="T1">Format Wejścia:</text:span></text:p>
      <text:p text:style-name="P1"><text:span text:style-name="T2">[Dla każdego typu materiału (6 łącznie)]</text:span></text:p>
      <text:p text:style-name="P1"><text:span text:style-name="T2">x;y;z;pojemność</text:span></text:p>
      <text:p text:style-name="P1"><text:span text:style-name="T2">x;y;z;pojemność</text:span></text:p>
      <text:p text:style-name="P1"><text:span text:style-name="T2">...</text:span></text:p>
      <text:p text:style-name="P1"><text:span text:style-name="T2">;;</text:span></text:p>
      <text:p text:style-name="P1"/>
      <text:p text:style-name="P1"><text:span text:style-name="T2">[Dla każdego typu materiału (6 łącznie)]</text:span></text:p>
      <text:p text:style-name="P1"><text:span text:style-name="T2">x;y;z</text:span></text:p>
      <text:p text:style-name="P1"><text:span text:style-name="T2">x;y;z</text:span></text:p>
      <text:p text:style-name="P1"><text:span text:style-name="T2">...</text:span></text:p>
      <text:p text:style-name="P1"><text:span text:style-name="T2">;;</text:span></text:p>
      <text:p text:style-name="P1"/>
      <text:p text:style-name="P1"><text:span text:style-name="T1">Transformacja Danych:</text:span></text:p>
      <text:p text:style-name="P9">Współrzędne wejściowe [0,1] są normalizowane do [-1,1]: <text:span text:style-name="T3">znormalizowane = 2×wejście - 1</text:span></text:p>
      <text:p text:style-name="P9">Wartości pojemności parsowane jako int64_t (maksymalnie 2^63-1)</text:p>
      <text:p text:style-name="P9">Współrzędne przechowywane jako double (precyzja IEEE 754)</text:p>
      <text:p text:style-name="P1"/>
      <text:p text:style-name="P1"><text:soft-page-break/><text:span text:style-name="T1">Obsługa Błędów:</text:span></text:p>
      <text:p text:style-name="P9">Zwraca false na plik nie znaleziony</text:p>
      <text:p text:style-name="P9">Loguje "ERROR, NO SUCH FILE" do stderr</text:p>
      <text:p text:style-name="P9">Waliduje integralność struktury danych</text:p>
      <text:p text:style-name="P1"/>
      <text:list xml:id="list37719434" text:continue-numbering="true" text:style-name="Outline">
        <text:list-item>
          <text:list>
            <text:list-item>
              <text:list>
                <text:list-item>
                  <text:h text:style-name="P6" text:outline-level="3">Moduł 2: Optymalizacja Przydzielania Siły Roboczej</text:h>
                </text:list-item>
              </text:list>
            </text:list-item>
          </text:list>
        </text:list-item>
      </text:list>
      <text:p text:style-name="P1"/>
      <text:p text:style-name="P1"><text:span text:style-name="T1">Funkcja Główna:</text:span> <text:span text:style-name="T3">country::assignDwarfsToWorkplaces()</text:span></text:p>
      <text:p text:style-name="P1"/>
      <text:p text:style-name="P1"><text:span text:style-name="T1">Przepływ Algorytmu:</text:span></text:p>
      <text:list xml:id="list37741441" text:continue-numbering="true" text:style-name="Outline">
        <text:list-item>
          <text:p text:style-name="P8">Dla każdego typu materiału niezależnie:</text:p>
        </text:list-item>
      </text:list>
      <text:p text:style-name="P9">Konstruuj graf dwudzielny: domy ↔ miejsca pracy</text:p>
      <text:p text:style-name="P9">Utwórz wierzchołki źródła i ujścia</text:p>
      <text:p text:style-name="P9">Dodaj krawędzie z kosztami odległości</text:p>
      <text:p text:style-name="P9">Wykonaj algorytm minimalnego kosztu maksymalnego przepływu</text:p>
      <text:p text:style-name="P9">Wyekstrahuj przydzielenie z grafu rezidualnego</text:p>
      <text:list xml:id="list37726937" text:continue-numbering="true" text:style-name="Outline">
        <text:list-item>
          <text:p text:style-name="P8">Wynik przydziałów do pliku (jedno przydzielenie na linię)</text:p>
        </text:list-item>
      </text:list>
      <text:p text:style-name="P1"/>
      <text:p text:style-name="P1"><text:span text:style-name="T1">Format Wyjścia:</text:span></text:p>
      <text:p text:style-name="P1"><text:span text:style-name="T2">[Dla każdego typu materiału]</text:span></text:p>
      <text:p text:style-name="P1"><text:span text:style-name="T2">indeks_domu;indeks_miejsca_pracy</text:span></text:p>
      <text:p text:style-name="P1"><text:span text:style-name="T2">indeks_domu;indeks_miejsca_pracy</text:span></text:p>
      <text:p text:style-name="P1"><text:span text:style-name="T2">...</text:span></text:p>
      <text:p text:style-name="P1"><text:span text:style-name="T2">;;</text:span></text:p>
      <text:p text:style-name="P1"/>
      <text:p text:style-name="P1"><text:span text:style-name="T1">Gwarancje Poprawności:</text:span></text:p>
      <text:p text:style-name="P9">Każdy dom przydzielony do dokładnie jednego miejsca pracy (jeśli pojemność pozwala)</text:p>
      <text:p text:style-name="P9">Żadne miejsce pracy nie przekracza ograniczenia pojemności</text:p>
      <text:p text:style-name="P9">Całkowity koszt zminimalizowany wśród wszystkich prawidłowych przydzielań</text:p>
      <text:p text:style-name="P9">Jedno-do-wielu przydzielenie dozwolone (jeśli miejsce pracy ma wyższą pojemność)</text:p>
      <text:p text:style-name="P1"/>
      <text:list xml:id="list37720842" text:continue-numbering="true" text:style-name="Outline">
        <text:list-item>
          <text:list>
            <text:list-item>
              <text:list>
                <text:list-item>
                  <text:h text:style-name="P6" text:outline-level="3">Moduł 3: Interaktywna Wizualizacja</text:h>
                </text:list-item>
              </text:list>
            </text:list-item>
          </text:list>
        </text:list-item>
      </text:list>
      <text:p text:style-name="P1"/>
      <text:p text:style-name="P1"><text:span text:style-name="T1">Plik:</text:span> <text:span text:style-name="T3">src/states/Visualization.h</text:span></text:p>
      <text:p text:style-name="P1"/>
      <text:p text:style-name="P1"><text:span text:style-name="T1">Potok Renderowania:</text:span></text:p>
      <text:p text:style-name="P1"><text:span text:style-name="T2">Faza Aktualizacji:</text:span></text:p>
      <text:p text:style-name="P1"><text:span text:style-name="T2"><text:s text:c="4"/>- Przetwarzanie wejścia (mysz, klawiatura)</text:span></text:p>
      <text:p text:style-name="P1"><text:span text:style-name="T2"><text:s text:c="4"/>- Aktualizacja kamery/widoku</text:span></text:p>
      <text:p text:style-name="P1"><text:span text:style-name="T2"><text:s text:c="4"/>- Obliczanie rzutowanych współrzędnych</text:span></text:p>
      <text:p text:style-name="P1"/>
      <text:p text:style-name="P1"><text:span text:style-name="T2">Faza Renderowania:</text:span></text:p>
      <text:p text:style-name="P1"><text:span text:style-name="T2"><text:s text:c="4"/>- Wyczyszczenie ekranu (czarne tło)</text:span></text:p>
      <text:p text:style-name="P1"><text:span text:style-name="T2"><text:s text:c="4"/>- Rysowanie granicy mapy (żółta otoczka)</text:span></text:p>
      <text:p text:style-name="P1"><text:span text:style-name="T2"><text:s text:c="4"/>- Rysowanie miejsc pracy (znaczniki diamentów z kolorami materiałów)</text:span></text:p>
      <text:p text:style-name="P1"><text:span text:style-name="T2"><text:s text:c="4"/>- Rysowanie domów (znaczniki w kształcie domów)</text:span></text:p>
      <text:p text:style-name="P1"><text:span text:style-name="T2"><text:s text:c="4"/>- Rysowanie połączeń przydziałów (linie)</text:span></text:p>
      <text:p text:style-name="P1"><text:span text:style-name="T2"><text:s text:c="4"/>- Renderowanie nakładki UI (przyciski, suwaki)</text:span></text:p>
      <text:p text:style-name="P1"/>
      <text:p text:style-name="P1"><text:span text:style-name="T1">System Współrzędnych:</text:span></text:p>
      <text:p text:style-name="P9"><text:span text:style-name="T1">Świat Gry:</text:span> Przestrzeń 3D [-1000, 1000] × [-1000, 1000] × [-1000, 1000]</text:p>
      <text:p text:style-name="P9"><text:span text:style-name="T1">Przestrzeń Ekranu:</text:span> Projekcja 2D [0, SCREEN<text:span text:style-name="T4">WIDTH] × [0, SCREEN</text:span>HEIGHT]</text:p>
      <text:p text:style-name="P1"/>
      <text:p text:style-name="P1"><text:span text:style-name="T1">Wskaźniki Wizualne:</text:span></text:p>
      <text:p text:style-name="P1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"><text:span text:style-name="T1">Jednostka</text:span></text:p>
          </table:table-cell>
          <table:table-cell table:style-name="Tabela2.A1" office:value-type="string">
            <text:p text:style-name="P2"><text:span text:style-name="T1">Kształt</text:span></text:p>
          </table:table-cell>
          <table:table-cell table:style-name="Tabela2.A1" office:value-type="string">
            <text:p text:style-name="P2"><text:span text:style-name="T1">Kolor</text:span></text:p>
          </table:table-cell>
          <table:table-cell table:style-name="Tabela2.A1" office:value-type="string">
            <text:p text:style-name="P2"><text:span text:style-name="T1">Znaczenie</text:span></text:p>
          </table:table-cell>
        </table:table-row>
        <table:table-row table:style-name="Tabela2.1">
          <table:table-cell table:style-name="Tabela2.A1" office:value-type="string">
            <text:p text:style-name="P1">Miejsce pracy</text:p>
          </table:table-cell>
          <table:table-cell table:style-name="Tabela2.A1" office:value-type="string">
            <text:p text:style-name="P1">Diament</text:p>
          </table:table-cell>
          <table:table-cell table:style-name="Tabela2.A1" office:value-type="string">
            <text:p text:style-name="P1">Zależny od materiału</text:p>
          </table:table-cell>
          <table:table-cell table:style-name="Tabela2.A1" office:value-type="string">
            <text:p text:style-name="P1">Место wydobywania zasobów</text:p>
          </table:table-cell>
        </table:table-row>
        <table:table-row table:style-name="Tabela2.1">
          <table:table-cell table:style-name="Tabela2.A1" office:value-type="string">
            <text:p text:style-name="P1">Dom</text:p>
          </table:table-cell>
          <table:table-cell table:style-name="Tabela2.A1" office:value-type="string">
            <text:p text:style-name="P1">Kształt domu</text:p>
          </table:table-cell>
          <table:table-cell table:style-name="Tabela2.A1" office:value-type="string">
            <text:p text:style-name="P1">Zależny od materiału</text:p>
          </table:table-cell>
          <table:table-cell table:style-name="Tabela2.A1" office:value-type="string">
            <text:p text:style-name="P1">Mieszkanie pracownika</text:p>
          </table:table-cell>
        </table:table-row>
        <table:table-row table:style-name="Tabela2.1">
          <table:table-cell table:style-name="Tabela2.A1" office:value-type="string">
            <text:p text:style-name="P1">Połączenie</text:p>
          </table:table-cell>
          <table:table-cell table:style-name="Tabela2.A1" office:value-type="string">
            <text:p text:style-name="P1">Linia</text:p>
          </table:table-cell>
          <table:table-cell table:style-name="Tabela2.A1" office:value-type="string">
            <text:p text:style-name="P1">Szara</text:p>
          </table:table-cell>
          <table:table-cell table:style-name="Tabela2.A1" office:value-type="string">
            <text:p text:style-name="P1">Przydzielona trasa pracy</text:p>
          </table:table-cell>
        </table:table-row>
        <table:table-row table:style-name="Tabela2.1">
          <table:table-cell table:style-name="Tabela2.A1" office:value-type="string">
            <text:p text:style-name="P1">Otoczka</text:p>
          </table:table-cell>
          <table:table-cell table:style-name="Tabela2.A1" office:value-type="string">
            <text:p text:style-name="P1">Żółta granica</text:p>
          </table:table-cell>
          <table:table-cell table:style-name="Tabela2.A1" office:value-type="string">
            <text:p text:style-name="P1">Żółty (#FFC400)</text:p>
          </table:table-cell>
          <table:table-cell table:style-name="Tabela2.A1" office:value-type="string">
            <text:p text:style-name="P1">Granica wypukłej otoczki</text:p>
          </table:table-cell>
        </table:table-row>
      </table:table>
      <text:p text:style-name="P1"/>
      <text:list xml:id="list37720583" text:continue-numbering="true" text:style-name="Outline">
        <text:list-item>
          <text:list>
            <text:list-item>
              <text:list>
                <text:list-item>
                  <text:h text:style-name="P6" text:outline-level="3"><text:soft-page-break/>Moduł 4: System Zarządzania Stanami</text:h>
                </text:list-item>
              </text:list>
            </text:list-item>
          </text:list>
        </text:list-item>
      </text:list>
      <text:p text:style-name="P1"/>
      <text:p text:style-name="P1"><text:span text:style-name="T1">Architektura:</text:span> Pattern Singleton z automatem stanów</text:p>
      <text:p text:style-name="P1"/>
      <text:p text:style-name="P1"><text:span text:style-name="T1">Przejścia Stanów:</text:span></text:p>
      <text:p text:style-name="P1"><text:span text:style-name="T2">Tytuł → Generuj (użytkownik tworzy/ładuje)</text:span></text:p>
      <text:p text:style-name="P1"><text:span text:style-name="T2"><text:s text:c="4"/>↓</text:span></text:p>
      <text:p text:style-name="P1"><text:span text:style-name="T2">Wizualizacja (interaktywne eksplorowanie)</text:span></text:p>
      <text:p text:style-name="P1"><text:span text:style-name="T2"><text:s text:c="4"/>↓</text:span></text:p>
      <text:p text:style-name="P1"><text:span text:style-name="T2">Podziękowania (wyświetl atrybuty)</text:span></text:p>
      <text:p text:style-name="P1"><text:span text:style-name="T2"><text:s text:c="4"/>↓</text:span></text:p>
      <text:p text:style-name="P1"><text:span text:style-name="T2">Tytuł (ponowny start)</text:span></text:p>
      <text:p text:style-name="P1"/>
      <text:p text:style-name="P1"><text:span text:style-name="T1">Animacja Przejścia:</text:span></text:p>
      <text:p text:style-name="P9">Czas trwania: 1.0 sekunda</text:p>
      <text:p text:style-name="P9">Mechanizm: Efekt kurtyny na ekranie z gradientem</text:p>
      <text:p text:style-name="P9">Formuła: <text:span text:style-name="T3">curtainY = (progress - offset) × animationSpeed × SCREEN_HEIGHT</text:span></text:p>
      <text:p text:style-name="P1"/>
      <text:p text:style-name="P1"><text:span text:style-name="T1">Bezpieczeństwo Wątków:</text:span> Projekt jednowątkowy (bez równoczesnych zmian stanów)</text:p>
      <text:p text:style-name="P1"/>
      <text:list xml:id="list37738465" text:continue-numbering="true" text:style-name="Outline">
        <text:list-item>
          <text:list>
            <text:list-item>
              <text:list>
                <text:list-item>
                  <text:h text:style-name="P6" text:outline-level="3">Moduł 5: Ustawienia &amp; Konfiguracja</text:h>
                </text:list-item>
              </text:list>
            </text:list-item>
          </text:list>
        </text:list-item>
      </text:list>
      <text:p text:style-name="P1"/>
      <text:p text:style-name="P1"><text:span text:style-name="T1">Plik:</text:span> <text:span text:style-name="T3">src/backend/SettingsManager.h</text:span></text:p>
      <text:p text:style-name="P1"/>
      <text:p text:style-name="P1"><text:span text:style-name="T1">Ustawienia Trwałe:</text:span></text:p>
      <text:p text:style-name="P9">Głośność muzyki (0.0 do 1.0)</text:p>
      <text:p text:style-name="P9">Pokaż licznik FPS (boolowski)</text:p>
      <text:p text:style-name="P9">Ustawienia jakości grafiki</text:p>
      <text:p text:style-name="P9">Czułość sterowania</text:p>
      <text:p text:style-name="P1"/>
      <text:p text:style-name="P1"><text:span text:style-name="T1">Wzorzec Dostępu:</text:span> Ładowanie leniwe przy pierwszym dostępie</text:p>
      <text:p text:style-name="P1"/>
      <text:p text:style-name="P1"/>
      <text:p text:style-name="P1"/>
      <text:list xml:id="list37732766" text:continue-numbering="true" text:style-name="Outline">
        <text:list-item>
          <text:list>
            <text:list-item>
              <text:h text:style-name="P4" text:outline-level="2">Dokumentacja API</text:h>
            </text:list-item>
          </text:list>
        </text:list-item>
      </text:list>
      <text:p text:style-name="P1"/>
      <text:list xml:id="list37717883" text:continue-numbering="true" text:style-name="Outline">
        <text:list-item>
          <text:list>
            <text:list-item>
              <text:list>
                <text:list-item>
                  <text:h text:style-name="P6" text:outline-level="3">Publiczny Interfejs Klasy Country</text:h>
                </text:list-item>
              </text:list>
            </text:list-item>
          </text:list>
        </text:list-item>
      </text:list>
      <text:p text:style-name="P1"><text:span text:style-name="T2">// Konstruowanie &amp; Destrukcja</text:span></text:p>
      <text:p text:style-name="P1"><text:span text:style-name="T2">country();</text:span></text:p>
      <text:p text:style-name="P1"><text:span text:style-name="T2">~country();</text:span></text:p>
      <text:p text:style-name="P1"/>
      <text:p text:style-name="P1"><text:span text:style-name="T2">// Wejście/Wyjście Pliku</text:span></text:p>
      <text:p text:style-name="P1"><text:span text:style-name="T2">bool constructFromFile(const std::string &amp;file_name);</text:span></text:p>
      <text:p text:style-name="P1"><text:span text:style-name="T2">bool assignDwarfsToWorkplaces(const std::string&amp; outputFile);</text:span></text:p>
      <text:p text:style-name="P1"/>
      <text:p text:style-name="P1"><text:span text:style-name="T2">// Interfejs Zapytań</text:span></text:p>
      <text:p text:style-name="P1"><text:span text:style-name="T2">const dynamicArray&lt;dynamicArray&lt;unique_ptr&lt;workplace&gt;&gt;&gt;&amp;</text:span></text:p>
      <text:p text:style-name="P1"><text:span text:style-name="T2"><text:s text:c="4"/>getWorkplaces() const;</text:span></text:p>
      <text:p text:style-name="P1"/>
      <text:p text:style-name="P1"><text:span text:style-name="T2">const dynamicArray&lt;dynamicArray&lt;unique_ptr&lt;house&gt;&gt;&gt;&amp;</text:span></text:p>
      <text:p text:style-name="P1"><text:span text:style-name="T2"><text:s text:c="4"/>getHouses() const;</text:span></text:p>
      <text:p text:style-name="P1"/>
      <text:p text:style-name="P1"><text:span text:style-name="T2">// Geometria Obliczeniowa</text:span></text:p>
      <text:p text:style-name="P1"><text:span text:style-name="T2">unique_ptr&lt;dynamicArray&lt;couple&lt;namedValues::material, int64_t&gt;&gt;&gt;</text:span></text:p>
      <text:p text:style-name="P1"><text:span text:style-name="T2"><text:s text:c="4"/>constructRimAroundCountry();</text:span></text:p>
      <text:p text:style-name="P1"/>
      <text:p text:style-name="P1"><text:span text:style-name="T2">couple&lt;namedValues::material, int64_t&gt;</text:span></text:p>
      <text:p text:style-name="P1"><text:span text:style-name="T2"><text:s text:c="4"/>findStartingPointOfRim(const dynamicArray&lt;...&gt;&amp; active);</text:span></text:p>
      <text:p text:style-name="P1"/>
      <text:p text:style-name="P1"><text:span text:style-name="T2">// Optymalizacja</text:span></text:p>
      <text:p text:style-name="P1"><text:span text:style-name="T2">double minCostMaxFlow(</text:span></text:p>
      <text:p text:style-name="P1"><text:span text:style-name="T2"><text:s text:c="4"/>dynamicArray&lt;dynamicArray&lt;edge&gt;&gt;&amp; graf,</text:span></text:p>
      <text:p text:style-name="P1"><text:span text:style-name="T2"><text:s text:c="4"/>int64_t źródło,</text:span></text:p>
      <text:p text:style-name="P1"><text:soft-page-break/><text:span text:style-name="T2"><text:s text:c="4"/>int64_t ujście</text:span></text:p>
      <text:p text:style-name="P1"><text:span text:style-name="T2">);</text:span></text:p>
      <text:p text:style-name="P1"/>
      <text:p text:style-name="P1"><text:span text:style-name="T2">// Narzędzie</text:span></text:p>
      <text:p text:style-name="P1"><text:span text:style-name="T2">bool isEmpty();</text:span></text:p>
      <text:p text:style-name="P1"><text:span text:style-name="T2">void dp(int64_t tabulation = 0); <text:s/>// Debug print</text:span></text:p>
      <text:p text:style-name="P1"/>
      <text:list xml:id="list37735890" text:continue-numbering="true" text:style-name="Outline">
        <text:list-item>
          <text:list>
            <text:list-item>
              <text:list>
                <text:list-item>
                  <text:h text:style-name="P6" text:outline-level="3">Publiczny Interfejs StateManager (Singleton)</text:h>
                </text:list-item>
              </text:list>
            </text:list-item>
          </text:list>
        </text:list-item>
      </text:list>
      <text:p text:style-name="P1"><text:span text:style-name="T2">class StateManager {</text:span></text:p>
      <text:p text:style-name="P1"><text:span text:style-name="T2">public:</text:span></text:p>
      <text:p text:style-name="P1"><text:span text:style-name="T2"><text:s text:c="4"/>static StateManager&amp; Instance();</text:span></text:p>
      <text:p text:style-name="P1"/>
      <text:p text:style-name="P1"><text:span text:style-name="T2"><text:s text:c="4"/>void ChangeState(GameState* newState);</text:span></text:p>
      <text:p text:style-name="P1"><text:span text:style-name="T2"><text:s text:c="4"/>void ProcessStateChange();</text:span></text:p>
      <text:p text:style-name="P1"><text:span text:style-name="T2"><text:s text:c="4"/>void Update(float deltaTime, country* countryPtr);</text:span></text:p>
      <text:p text:style-name="P1"><text:span text:style-name="T2"><text:s text:c="4"/>void Draw();</text:span></text:p>
      <text:p text:style-name="P1"><text:span text:style-name="T2"><text:s text:c="4"/>void Shutdown();</text:span></text:p>
      <text:p text:style-name="P1"/>
      <text:p text:style-name="P1"><text:span text:style-name="T2"><text:s text:c="4"/>bool IsTransitioning() const;</text:span></text:p>
      <text:p text:style-name="P1"><text:span text:style-name="T2">};</text:span></text:p>
      <text:p text:style-name="P1"/>
      <text:list xml:id="list37719933" text:continue-numbering="true" text:style-name="Outline">
        <text:list-item>
          <text:list>
            <text:list-item>
              <text:list>
                <text:list-item>
                  <text:h text:style-name="P6" text:outline-level="3">Publiczny Interfejs DynamicArray&lt;T&gt;</text:h>
                </text:list-item>
              </text:list>
            </text:list-item>
          </text:list>
        </text:list-item>
      </text:list>
      <text:p text:style-name="P1"><text:span text:style-name="T2">template &lt;typename T&gt;</text:span></text:p>
      <text:p text:style-name="P1"><text:span text:style-name="T2">class dynamicArray {</text:span></text:p>
      <text:p text:style-name="P1"><text:span text:style-name="T2">public:</text:span></text:p>
      <text:p text:style-name="P1"><text:span text:style-name="T2"><text:s text:c="4"/>// Inicjalizacja</text:span></text:p>
      <text:p text:style-name="P1"><text:span text:style-name="T2"><text:s text:c="4"/>dynamicArray();</text:span></text:p>
      <text:p text:style-name="P1"><text:span text:style-name="T2"><text:s text:c="4"/>dynamicArray(int64_t size);</text:span></text:p>
      <text:p text:style-name="P1"/>
      <text:p text:style-name="P1"><text:span text:style-name="T2"><text:s text:c="4"/>// Dostęp</text:span></text:p>
      <text:p text:style-name="P1"><text:span text:style-name="T2"><text:s text:c="4"/>T&amp; operator[](const int64_t &amp;index);</text:span></text:p>
      <text:p text:style-name="P1"><text:span text:style-name="T2"><text:s text:c="4"/>const T&amp; operator[](const int64_t &amp;index) const;</text:span></text:p>
      <text:p text:style-name="P1"><text:span text:style-name="T2"><text:s text:c="4"/>T&amp; at(int64_t index);</text:span></text:p>
      <text:p text:style-name="P1"><text:span text:style-name="T2"><text:s text:c="4"/>T&amp; front();</text:span></text:p>
      <text:p text:style-name="P1"><text:span text:style-name="T2"><text:s text:c="4"/>T&amp; back();</text:span></text:p>
      <text:p text:style-name="P1"/>
      <text:p text:style-name="P1"><text:span text:style-name="T2"><text:s text:c="4"/>// Modyfikacja</text:span></text:p>
      <text:p text:style-name="P1"><text:span text:style-name="T2"><text:s text:c="4"/>void append(T&amp;&amp; val);</text:span></text:p>
      <text:p text:style-name="P1"><text:span text:style-name="T2"><text:s text:c="4"/>void append(const T&amp; val);</text:span></text:p>
      <text:p text:style-name="P1"><text:span text:style-name="T2"><text:s text:c="4"/>bool insert(T&amp;&amp; val, int64_t index);</text:span></text:p>
      <text:p text:style-name="P1"><text:span text:style-name="T2"><text:s text:c="4"/>bool remove(int64_t index);</text:span></text:p>
      <text:p text:style-name="P1"><text:span text:style-name="T2"><text:s text:c="4"/>void clear();</text:span></text:p>
      <text:p text:style-name="P1"/>
      <text:p text:style-name="P1"><text:span text:style-name="T2"><text:s text:c="4"/>// Zapytania</text:span></text:p>
      <text:p text:style-name="P1"><text:span text:style-name="T2"><text:s text:c="4"/>int64_t getSize() const;</text:span></text:p>
      <text:p text:style-name="P1"><text:span text:style-name="T2"><text:s text:c="4"/>int64_t getLastIndex() const;</text:span></text:p>
      <text:p text:style-name="P1"><text:span text:style-name="T2"><text:s text:c="4"/>bool isEmpty() const;</text:span></text:p>
      <text:p text:style-name="P1"/>
      <text:p text:style-name="P1"><text:span text:style-name="T2"><text:s text:c="4"/>// Manipulacja</text:span></text:p>
      <text:p text:style-name="P1"><text:span text:style-name="T2"><text:s text:c="4"/>bool swap(int64_t indexA, int64_t indexB);</text:span></text:p>
      <text:p text:style-name="P1"><text:span text:style-name="T2"><text:s text:c="4"/>void reverseOrder();</text:span></text:p>
      <text:p text:style-name="P1"><text:span text:style-name="T2"><text:s text:c="4"/>void shrinkToFit();</text:span></text:p>
      <text:p text:style-name="P1"><text:span text:style-name="T2"><text:s text:c="4"/>void forceShrink(int64_t newSize);</text:span></text:p>
      <text:p text:style-name="P1"><text:span text:style-name="T2">};</text:span></text:p>
      <text:p text:style-name="P1"/>
      <text:p text:style-name="P1"/>
      <text:p text:style-name="P1"/>
      <text:list xml:id="list37730094" text:continue-numbering="true" text:style-name="Outline">
        <text:list-item>
          <text:list>
            <text:list-item>
              <text:h text:style-name="P4" text:outline-level="2">Formalizacja Matematyczna</text:h>
            </text:list-item>
          </text:list>
        </text:list-item>
      </text:list>
      <text:p text:style-name="P1"/>
      <text:list xml:id="list37730817" text:continue-numbering="true" text:style-name="Outline">
        <text:list-item>
          <text:list>
            <text:list-item>
              <text:list>
                <text:list-item>
                  <text:h text:style-name="P6" text:outline-level="3">1. Metryka Odległości</text:h>
                </text:list-item>
              </text:list>
            </text:list-item>
          </text:list>
        </text:list-item>
      </text:list>
      <text:p text:style-name="P1"/>
      <text:p text:style-name="P1"><text:span text:style-name="T1">Odległość Euklidesowa w 3D:</text:span></text:p>
      <text:p text:style-name="P1"><text:span text:style-name="T2">d(p1, p2) = √((x₁-x₂)² + (y₁-y₂)² + (z₁-z₂)²)</text:span></text:p>
      <text:p text:style-name="P1"/>
      <text:p text:style-name="P1"><text:span text:style-name="T1">Implementacja:</text:span> Funkcja <text:span text:style-name="T3">distance()</text:span> używająca std::sqrt</text:p>
      <text:p text:style-name="P1"/>
      <text:p text:style-name="P1"><text:soft-page-break/><text:span text:style-name="T1">Użycie:</text:span> Obliczanie wag krawędzi w grafie przydzielania</text:p>
      <text:p text:style-name="P1"/>
      <text:list xml:id="list37733393" text:continue-numbering="true" text:style-name="Outline">
        <text:list-item>
          <text:list>
            <text:list-item>
              <text:list>
                <text:list-item>
                  <text:h text:style-name="P6" text:outline-level="3">2. Dowód Poprawności Wypukłej Otoczki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Algorytm Graham scan produkuje minimalny wielokąt wypukły zawierający wszystkie punkty.</text:p>
      <text:p text:style-name="P1"/>
      <text:p text:style-name="P1"><text:span text:style-name="T1">Szkic Dowodu:</text:span></text:p>
      <text:list xml:id="list37727674" text:continue-numbering="true" text:style-name="Outline">
        <text:list-item>
          <text:p text:style-name="P8">Z konstrukcji, wszystkie punkty leżą w obrębie lub na granicy otoczki</text:p>
        </text:list-item>
        <text:list-item>
          <text:p text:style-name="P8">Test iloczynu wektorowego zapewnia brak punktów wewnętrznych</text:p>
        </text:list-item>
        <text:list-item>
          <text:p text:style-name="P8">Sortowanie po kącie polarnym zapewnia prawidłowy porządek przechodzenia</text:p>
        </text:list-item>
        <text:list-item>
          <text:p text:style-name="P8">Żadne trzy kolejne punkty nie są kolinearne (test ścisłej nierówności)</text:p>
        </text:list-item>
        <text:list-item>
          <text:p text:style-name="P8">Zatem wynik jest minimalnym wielokątem wypukłym ✓</text:p>
        </text:list-item>
      </text:list>
      <text:p text:style-name="P1"/>
      <text:list xml:id="list37739250" text:continue-numbering="true" text:style-name="Outline">
        <text:list-item>
          <text:list>
            <text:list-item>
              <text:list>
                <text:list-item>
                  <text:h text:style-name="P6" text:outline-level="3">3. Optymalizacja Min-Cost Max-Flow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Algorytm kolejnych najkrótszych ścieżek produkuje minimalny koszt wśród wszystkich maksymalnych przepływów.</text:p>
      <text:p text:style-name="P1"/>
      <text:p text:style-name="P1"><text:span text:style-name="T1">Kluczowy Niezmiennik:</text:span> Po każdej iteracji, bieżący przepływ jest minimalnym kosztem maksymalnego przepływu dla jego wartości.</text:p>
      <text:p text:style-name="P1"/>
      <text:p text:style-name="P1"><text:span text:style-name="T1">Struktura Dowodu:</text:span></text:p>
      <text:p text:style-name="P9">Bazał: Przepływ zerowy ma koszt zerowy (minimum)</text:p>
      <text:p text:style-name="P9">Krok indukcyjny: Dodanie minimalnego kosztu ścieżki powiększającej zachowuje optymalizm</text:p>
      <text:p text:style-name="P9">Zakończenie: Gdy brak ścieżki powiększającej, osiągnięto maksymalny przepływ</text:p>
      <text:p text:style-name="P9">Wniosek: Rozwiązanie końcowe to minimalny koszt maksymalny przepływ ✓</text:p>
      <text:p text:style-name="P1"/>
      <text:list xml:id="list37736356" text:continue-numbering="true" text:style-name="Outline">
        <text:list-item>
          <text:list>
            <text:list-item>
              <text:list>
                <text:list-item>
                  <text:h text:style-name="P6" text:outline-level="3">4. Analiza Złożoności Czasowej</text:h>
                </text:list-item>
              </text:list>
            </text:list-item>
          </text:list>
        </text:list-item>
      </text:list>
      <text:p text:style-name="P1"/>
      <text:p text:style-name="P1"><text:span text:style-name="T1">Problem Przydzielenia:</text:span></text:p>
      <text:p text:style-name="P1"/>
      <text:p text:style-name="P1">Dla M typów materiałów, H<text:span text:style-name="T4">m domów typu m, W</text:span>m miejsc pracy typu m:</text:p>
      <text:p text:style-name="P1"><text:span text:style-name="T2">Konstrukcja Grafu: O(Σ H_m × W_m)</text:span></text:p>
      <text:p text:style-name="P1"><text:span text:style-name="T2">Iteracje Min-Cost Max-Flow: O(F × SPFA)</text:span></text:p>
      <text:p text:style-name="P1"><text:span text:style-name="T2"><text:s text:c="4"/>gdzie F = Σ H_m (całkowity wymagany przepływ)</text:span></text:p>
      <text:p text:style-name="P1"><text:span text:style-name="T2"><text:s text:c="4"/>SPFA na iterację: O((H_m + W_m + 2) × (H_m × W_m))</text:span></text:p>
      <text:p text:style-name="P1"/>
      <text:p text:style-name="P1"><text:span text:style-name="T2">Całkowita Złożoność: O(M × H_max × W_max × złożoność_SPFA)</text:span></text:p>
      <text:p text:style-name="P1"><text:span text:style-name="T2">Praktycznie: O(M × n × SPFA) gdzie n = max(H, W)</text:span></text:p>
      <text:p text:style-name="P1"/>
      <text:p text:style-name="P1"><text:span text:style-name="T1">Złożoność Przestrzeni:</text:span> O(H × W) do przechowywania grafu</text:p>
      <text:p text:style-name="P1"/>
      <text:p text:style-name="P1"/>
      <text:p text:style-name="P1"/>
      <text:list xml:id="list37718963" text:continue-numbering="true" text:style-name="Outline">
        <text:list-item>
          <text:list>
            <text:list-item>
              <text:h text:style-name="P4" text:outline-level="2">Wnioski</text:h>
            </text:list-item>
          </text:list>
        </text:list-item>
      </text:list>
      <text:p text:style-name="P1"/>
      <text:p text:style-name="P1">KrasnoLudki z powodzeniem integruje wielokrotne zaawansowane algorytmy w geometrii obliczeniowej i teorii grafów do rozwiązywania praktycznego problemu optymalizacyjnego. Modularna architektura pozwala na niezależną weryfikację i testowanie każdego komponenty. Poprawność matematyczna jest formalnie ustalona poprzez utrzymanie niezmienników i techniki dowodu przez indukcję.</text:p>
      <text:p text:style-name="P1"/>
      <text:p text:style-name="P1"><text:span text:style-name="T1">Kluczowe Osiągnięcia:</text:span></text:p>
      <text:p text:style-name="P9">✓ Optymalne przydzielenie siły roboczej poprzez min-cost max-flow</text:p>
      <text:p text:style-name="P9">✓ Detekcja granicy geometrycznej poprzez wypukłą otoczkę</text:p>
      <text:p text:style-name="P9">✓ Interaktywna wizualizacja z renderowaniem w czasie rzeczywistym</text:p>
      <text:p text:style-name="P9">✓ Wydajne struktury danych z udowodnionymi złożonościami</text:p>
      <text:p text:style-name="P9">✓ Modularna, testowalna architek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6-13T17:45:05.35</dc:date>
    <meta:editing-duration>P0D</meta:editing-duration>
    <meta:generator>OpenOffice/4.1.11$Win32 OpenOffice.org_project/4111m1$Build-9808</meta:generator>
    <meta:document-statistic meta:table-count="2" meta:image-count="0" meta:object-count="0" meta:page-count="10" meta:paragraph-count="464" meta:word-count="2089" meta:character-count="17870"/>
    <dc:creator>Szymon Zakierski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