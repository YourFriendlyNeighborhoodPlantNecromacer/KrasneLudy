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05cm" fo:margin-left="-0.191cm" fo:margin-top="0cm" fo:margin-bottom="0cm" table:align="left" style:writing-mode="lr-tb"/>
    </style:style>
    <style:style style:name="Tabela1.A" style:family="table-column">
      <style:table-column-properties style:column-width="3.81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2" style:family="table">
      <style:table-properties style:width="19.05cm" fo:margin-left="-0.191cm" fo:margin-top="0cm" fo:margin-bottom="0cm" table:align="left" style:writing-mode="lr-tb"/>
    </style:style>
    <style:style style:name="Tabela2.A" style:family="table-column">
      <style:table-column-properties style:column-width="6.3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Heading_20_3">
      <style:paragraph-properties fo:margin-top="0cm" fo:margin-bottom="0cm" fo:line-height="100%"/>
    </style:style>
    <style:style style:name="P4" style:family="paragraph" style:parent-style-name="List_20_Bullet">
      <style:paragraph-properties fo:margin-top="0cm" fo:margin-bottom="0cm" fo:line-height="100%"/>
    </style:style>
    <style:style style:name="P5" style:family="paragraph" style:parent-style-name="List_20_Number">
      <style:paragraph-properties fo:margin-top="0cm" fo:margin-bottom="0cm" fo:line-height="100%"/>
    </style:style>
    <style:style style:name="P6" style:family="paragraph" style:parent-style-name="Heading_20_2">
      <style:paragraph-properties fo:margin-top="0cm" fo:margin-bottom="0cm" fo:line-height="100%"/>
    </style:style>
    <style:style style:name="P7" style:family="paragraph" style:parent-style-name="Heading_20_1" style:master-page-name="Standard">
      <style:paragraph-properties fo:margin-top="0cm" fo:margin-bottom="0cm" fo:line-height="100%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nsolas" fo:font-size="8.5pt" style:font-size-asian="8.5pt"/>
    </style:style>
    <style:style style:name="T3" style:family="text">
      <style:text-properties style:font-name="Consolas" fo:font-size="9.5pt" style:font-size-asian="9.5pt"/>
    </style:style>
    <style:style style:name="T4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99129093270050443" text:style-name="Outline">
        <text:list-item>
          <text:p text:style-name="P7">Analiza Poprawności Rozwiązania i Formalna Weryfikacja</text:p>
          <text:list>
            <text:list-item>
              <text:h text:style-name="P6" text:outline-level="2">KrasnoLudki: System Optymalnego Przydzielania Pracowników</text:h>
            </text:list-item>
          </text:list>
        </text:list-item>
      </text:list>
      <text:p text:style-name="P1"/>
      <text:p text:style-name="P1"><text:span text:style-name="T1">Typ Dokumentu:</text:span> Raport Formalnej Weryfikacji</text:p>
      <text:p text:style-name="P1"/>
      <text:p text:style-name="P1"><text:span text:style-name="T1">Klasyfikacja:</text:span> Techniczny - Poziom Uniwersytetu</text:p>
      <text:p text:style-name="P1"/>
      <text:p text:style-name="P1"><text:span text:style-name="T1">Data:</text:span> 2026-06-13</text:p>
      <text:p text:style-name="P1"/>
      <text:p text:style-name="P1"/>
      <text:p text:style-name="P1"/>
      <text:list xml:id="list37736326" text:continue-numbering="true" text:style-name="Outline">
        <text:list-item>
          <text:list>
            <text:list-item>
              <text:h text:style-name="P6" text:outline-level="2">Spis Treści</text:h>
            </text:list-item>
          </text:list>
        </text:list-item>
      </text:list>
      <text:p text:style-name="P1"/>
      <text:list xml:id="list37739644" text:continue-numbering="true" text:style-name="Outline">
        <text:list-item>
          <text:p text:style-name="P5">[Sformułowanie Problemu](#sformułowanie-problemu)</text:p>
        </text:list-item>
        <text:list-item>
          <text:p text:style-name="P5">[Przegląd Rozwiązania](#przegląd-rozwiązania)</text:p>
        </text:list-item>
        <text:list-item>
          <text:p text:style-name="P5">[Formalne Dowody Poprawności](#formalne-dowody-poprawności)</text:p>
        </text:list-item>
        <text:list-item>
          <text:p text:style-name="P5">[Weryfikacja Algorytmów](#weryfikacja-algorytmów)</text:p>
        </text:list-item>
        <text:list-item>
          <text:p text:style-name="P5">[Niezmienniki Struktur Danych](#niezmienniki-struktur-danych)</text:p>
        </text:list-item>
        <text:list-item>
          <text:p text:style-name="P5">[Poprawność Integracji](#poprawność-integracji)</text:p>
        </text:list-item>
        <text:list-item>
          <text:p text:style-name="P5">[Strategia Walidacji Empirycznej](#strategia-walidacji-empirycznej)</text:p>
        </text:list-item>
        <text:list-item>
          <text:p text:style-name="P5">[Znane Ograniczenia](#znane-ograniczenia)</text:p>
        </text:list-item>
      </text:list>
      <text:p text:style-name="P1"/>
      <text:p text:style-name="P1"/>
      <text:p text:style-name="P1"/>
      <text:list xml:id="list37725655" text:continue-numbering="true" text:style-name="Outline">
        <text:list-item>
          <text:list>
            <text:list-item>
              <text:h text:style-name="P6" text:outline-level="2">1. Sformułowanie Problemu</text:h>
            </text:list-item>
          </text:list>
        </text:list-item>
      </text:list>
      <text:p text:style-name="P1"/>
      <text:list xml:id="list37734207" text:continue-numbering="true" text:style-name="Outline">
        <text:list-item>
          <text:list>
            <text:list-item>
              <text:list>
                <text:list-item>
                  <text:h text:style-name="P3" text:outline-level="3">1.1 Definicja Formalna</text:h>
                </text:list-item>
              </text:list>
            </text:list-item>
          </text:list>
        </text:list-item>
      </text:list>
      <text:p text:style-name="P1"/>
      <text:p text:style-name="P1"><text:span text:style-name="T1">Wejście:</text:span></text:p>
      <text:p text:style-name="P4">Niech M = {m₀, m₁, m₂, m₃, m₄, m₅} będzie zbiorem typów materiałów</text:p>
      <text:p text:style-name="P4">Dla każdego typu materiału mᵢ:</text:p>
      <text:p text:style-name="P4">Zbiór Wᵢ z |Wᵢ| miejscami pracy, każde z:</text:p>
      <text:p text:style-name="P4">Lokalizacją wᵢⱼ = (xᵢⱼ, yᵢⱼ, zᵢⱼ) ∈ ℝ³</text:p>
      <text:p text:style-name="P4">Pojemnością capᵢⱼ ∈ ℤ⁺</text:p>
      <text:p text:style-name="P4">Stanem aktywności activeᵢⱼ ∈ {true, false}</text:p>
      <text:p text:style-name="P4">Zbiór Hᵢ z |Hᵢ| domami, każdy z:</text:p>
      <text:p text:style-name="P4">Lokalizacją hᵢₖ = (xᵢₖ, yᵢₖ, zᵢₖ) ∈ ℝ³</text:p>
      <text:p text:style-name="P4">Jednym mieszkańcem (podaż = 1)</text:p>
      <text:p text:style-name="P1"/>
      <text:p text:style-name="P1"><text:span text:style-name="T1">Cel:</text:span> Znaleźć funkcję przydzielenia A: ⋃ Hᵢ → ⋃ Wᵢ</text:p>
      <text:p text:style-name="P1"/>
      <text:p text:style-name="P1"><text:span text:style-name="T1">Ograniczenia:</text:span></text:p>
      <text:list xml:id="list37732373" text:continue-numbering="true" text:style-name="Outline">
        <text:list-item>
          <text:p text:style-name="P5"><text:span text:style-name="T1">Ograniczenie Pojemności:</text:span> Dla każdego miejsca pracy wᵢⱼ:</text:p>
        </text:list-item>
      </text:list>
      <text:p text:style-name="P1"><text:span text:style-name="T2"><text:s text:c="3"/>|{h ∈ Hᵢ : A(h) = wᵢⱼ}| ≤ capᵢⱼ</text:span></text:p>
      <text:p text:style-name="P1"/>
      <text:list xml:id="list37748256" text:continue-numbering="true" text:style-name="Outline">
        <text:list-item>
          <text:p text:style-name="P5"><text:span text:style-name="T1">Ograniczenie Materiału:</text:span> Każdy dom przydzielony jest tylko do miejsc pracy swojego typu materiału:</text:p>
        </text:list-item>
      </text:list>
      <text:p text:style-name="P1"><text:span text:style-name="T2"><text:s text:c="3"/>∀h ∈ Hᵢ: A(h) ∈ Wᵢ</text:span></text:p>
      <text:p text:style-name="P1"/>
      <text:list xml:id="list37735243" text:continue-numbering="true" text:style-name="Outline">
        <text:list-item>
          <text:p text:style-name="P5"><text:span text:style-name="T1">Przydzielenie Jeden-do-Jednego:</text:span> Każdy dom musi być przydzielony do dokładnie jednego miejsca pracy (jeśli jest dostępna pojemność):</text:p>
        </text:list-item>
      </text:list>
      <text:p text:style-name="P1"><text:span text:style-name="T2"><text:s text:c="3"/>|{wᵢⱼ : A(h) = wᵢⱼ}| = 1 ∀h z dostępną pojemnością</text:span></text:p>
      <text:p text:style-name="P1"/>
      <text:list xml:id="list37751569" text:continue-numbering="true" text:style-name="Outline">
        <text:list-item>
          <text:p text:style-name="P5"><text:span text:style-name="T1">Równowaga Podaż-Popyt:</text:span> Całkowity przydzielony liczba pracowników ≤ Całkowita pojemność miejsc pracy:</text:p>
        </text:list-item>
      </text:list>
      <text:p text:style-name="P1"><text:span text:style-name="T2"><text:s text:c="3"/>∑ᵢ |Hᵢ| ≤ ∑ᵢ ∑ⱼ capᵢⱼ</text:span></text:p>
      <text:p text:style-name="P1"/>
      <text:p text:style-name="P1"/>
      <text:p text:style-name="P1"/>
      <text:p text:style-name="P1"/>
      <text:p text:style-name="P1"><text:soft-page-break/><text:span text:style-name="T1">Funkcja Kosztu:</text:span></text:p>
      <text:p text:style-name="P1"><text:span text:style-name="T2">Koszt(A) = ∑ᵢ ∑ₖ d(hᵢₖ, A(hᵢₖ))</text:span></text:p>
      <text:p text:style-name="P1"/>
      <text:p text:style-name="P1"><text:span text:style-name="T2">gdzie d(p₁, p₂) = √((p₁.x - p₂.x)² + (p₁.y - p₂.y)² + (p₁.z - p₂.z)²)</text:span></text:p>
      <text:p text:style-name="P1"/>
      <text:p text:style-name="P1"><text:span text:style-name="T1">Cel:</text:span> Znaleźć przydzielenie minimalizujące koszt z zachowaniem wszystkich ograniczeń.</text:p>
      <text:p text:style-name="P1"/>
      <text:list xml:id="list37740122" text:continue-numbering="true" text:style-name="Outline">
        <text:list-item>
          <text:list>
            <text:list-item>
              <text:list>
                <text:list-item>
                  <text:h text:style-name="P3" text:outline-level="3">1.2 Klasyfikacja Problemu</text:h>
                </text:list-item>
              </text:list>
            </text:list-item>
          </text:list>
        </text:list-item>
      </text:list>
      <text:p text:style-name="P1"/>
      <text:p text:style-name="P1">To jest <text:span text:style-name="T1">Problem Minimalnego Kosztu Maksymalnego Przepływu</text:span> na grafie dwudzielnym:</text:p>
      <text:p text:style-name="P4"><text:span text:style-name="T1">Typ:</text:span> Problem programowania liniowego</text:p>
      <text:p text:style-name="P4"><text:span text:style-name="T1">Złożoność:</text:span> Rozwiązywalny w czasie wielomianowym</text:p>
      <text:p text:style-name="P4"><text:span text:style-name="T1">NP-Trudność:</text:span> Nie jest NP-trudny</text:p>
      <text:p text:style-name="P4"><text:span text:style-name="T1">Aproksymacja:</text:span> Gwarantowane optymalne rozwiązanie</text:p>
      <text:p text:style-name="P1"/>
      <text:p text:style-name="P1"/>
      <text:p text:style-name="P1"/>
      <text:list xml:id="list37737318" text:continue-numbering="true" text:style-name="Outline">
        <text:list-item>
          <text:list>
            <text:list-item>
              <text:h text:style-name="P6" text:outline-level="2">2. Przegląd Rozwiązania</text:h>
            </text:list-item>
          </text:list>
        </text:list-item>
      </text:list>
      <text:p text:style-name="P1"/>
      <text:list xml:id="list37745548" text:continue-numbering="true" text:style-name="Outline">
        <text:list-item>
          <text:list>
            <text:list-item>
              <text:list>
                <text:list-item>
                  <text:h text:style-name="P3" text:outline-level="3">2.1 Architektura Rozwiązania</text:h>
                </text:list-item>
              </text:list>
            </text:list-item>
          </text:list>
        </text:list-item>
      </text:list>
      <text:p text:style-name="P1"/>
      <text:p text:style-name="P1">Rozwiązanie rozkłada problem według typu materiału:</text:p>
      <text:p text:style-name="P1"><text:span text:style-name="T2">Globalny Problem:</text:span></text:p>
      <text:p text:style-name="P1"><text:span text:style-name="T2"><text:s text:c="4"/>Minimalizuj: ∑ᵢ KosztMCMF(typ_materiału=i)</text:span></text:p>
      <text:p text:style-name="P1"><text:span text:style-name="T2"><text:s text:c="4"/>Pod warunkiem: Ograniczenia dla każdego typu materiału</text:span></text:p>
      <text:p text:style-name="P1"/>
      <text:p text:style-name="P1"><text:span text:style-name="T2">Podproblem Dla Typu Materiału i:</text:span></text:p>
      <text:p text:style-name="P1"><text:span text:style-name="T2"><text:s text:c="4"/>Wejście: Zbiór |Hᵢ| domów i |Wᵢ| miejsc pracy</text:span></text:p>
      <text:p text:style-name="P1"><text:span text:style-name="T2"><text:s text:c="4"/>Skonstruuj graf dwudzielny G_i = (V_i, E_i)</text:span></text:p>
      <text:p text:style-name="P1"><text:span text:style-name="T2"><text:s text:c="4"/>Zastosuj algorytm MCMF</text:span></text:p>
      <text:p text:style-name="P1"><text:span text:style-name="T2"><text:s text:c="4"/>Wyjście: Przydzielenie dla typu materiału i</text:span></text:p>
      <text:p text:style-name="P1"/>
      <text:list xml:id="list37745006" text:continue-numbering="true" text:style-name="Outline">
        <text:list-item>
          <text:list>
            <text:list-item>
              <text:list>
                <text:list-item>
                  <text:h text:style-name="P3" text:outline-level="3">2.2 Konstruowanie Grafu Dwudzielnego dla Typu Materiału i</text:h>
                </text:list-item>
              </text:list>
            </text:list-item>
          </text:list>
        </text:list-item>
      </text:list>
      <text:p text:style-name="P1"/>
      <text:p text:style-name="P1"><text:span text:style-name="T1">Zbiór Wierzchołków V_i:</text:span></text:p>
      <text:p text:style-name="P1"><text:span text:style-name="T2">V_i = {źródło, h₁, h₂, ..., h_{|H_i|}, w₁, w₂, ..., w_{|W_i|}, ujście}</text:span></text:p>
      <text:p text:style-name="P1"/>
      <text:p text:style-name="P1"><text:span text:style-name="T2">|V_i| = 2 + |H_i| + |W_i|</text:span></text:p>
      <text:p text:style-name="P1"/>
      <text:p text:style-name="P1"><text:span text:style-name="T1">Zbiór Krawędzi E_i:</text:span></text:p>
      <text:p text:style-name="P1"/>
      <table:table table:name="Tabela1" table:style-name="Tabela1">
        <table:table-column table:style-name="Tabela1.A" table:number-columns-repeated="5"/>
        <table:table-row table:style-name="Tabela1.1">
          <table:table-cell table:style-name="Tabela1.A1" office:value-type="string">
            <text:p text:style-name="P2"><text:span text:style-name="T1">Od</text:span></text:p>
          </table:table-cell>
          <table:table-cell table:style-name="Tabela1.A1" office:value-type="string">
            <text:p text:style-name="P2"><text:span text:style-name="T1">Do</text:span></text:p>
          </table:table-cell>
          <table:table-cell table:style-name="Tabela1.A1" office:value-type="string">
            <text:p text:style-name="P2"><text:span text:style-name="T1">Pojemność</text:span></text:p>
          </table:table-cell>
          <table:table-cell table:style-name="Tabela1.A1" office:value-type="string">
            <text:p text:style-name="P2"><text:span text:style-name="T1">Koszt</text:span></text:p>
          </table:table-cell>
          <table:table-cell table:style-name="Tabela1.A1" office:value-type="string">
            <text:p text:style-name="P2"><text:span text:style-name="T1">Semantyka</text:span></text:p>
          </table:table-cell>
        </table:table-row>
        <table:table-row table:style-name="Tabela1.1">
          <table:table-cell table:style-name="Tabela1.A1" office:value-type="string">
            <text:p text:style-name="P1">źródło</text:p>
          </table:table-cell>
          <table:table-cell table:style-name="Tabela1.A1" office:value-type="string">
            <text:p text:style-name="P1">hⱼ</text:p>
          </table:table-cell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0</text:p>
          </table:table-cell>
          <table:table-cell table:style-name="Tabela1.A1" office:value-type="string">
            <text:p text:style-name="P1">Pracownik opuszcza dom j</text:p>
          </table:table-cell>
        </table:table-row>
        <table:table-row table:style-name="Tabela1.1">
          <table:table-cell table:style-name="Tabela1.A1" office:value-type="string">
            <text:p text:style-name="P1">hⱼ</text:p>
          </table:table-cell>
          <table:table-cell table:style-name="Tabela1.A1" office:value-type="string">
            <text:p text:style-name="P1">wⱼ</text:p>
          </table:table-cell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d(hⱼ, wⱼ)</text:p>
          </table:table-cell>
          <table:table-cell table:style-name="Tabela1.A1" office:value-type="string">
            <text:p text:style-name="P1">Pracownik podróżuje do miejsca pracy</text:p>
          </table:table-cell>
        </table:table-row>
        <table:table-row table:style-name="Tabela1.1">
          <table:table-cell table:style-name="Tabela1.A1" office:value-type="string">
            <text:p text:style-name="P1">wⱼ</text:p>
          </table:table-cell>
          <table:table-cell table:style-name="Tabela1.A1" office:value-type="string">
            <text:p text:style-name="P1">ujście</text:p>
          </table:table-cell>
          <table:table-cell table:style-name="Tabela1.A1" office:value-type="string">
            <text:p text:style-name="P1">capⱼ</text:p>
          </table:table-cell>
          <table:table-cell table:style-name="Tabela1.A1" office:value-type="string">
            <text:p text:style-name="P1">0</text:p>
          </table:table-cell>
          <table:table-cell table:style-name="Tabela1.A1" office:value-type="string">
            <text:p text:style-name="P1">Miejsce pracy absorbuję pracowników aż do pojemności</text:p>
          </table:table-cell>
        </table:table-row>
      </table:table>
      <text:p text:style-name="P1"/>
      <text:p text:style-name="P1"><text:span text:style-name="T1">Liczba Krawędzi:</text:span></text:p>
      <text:p text:style-name="P1"><text:span text:style-name="T2">|E_i| = |H_i| + (|H_i| × |W_i|) + |W_i|</text:span></text:p>
      <text:p text:style-name="P1"><text:span text:style-name="T2"><text:s text:c="6"/>= |H_i|(1 + |W_i|) + |W_i|</text:span></text:p>
      <text:p text:style-name="P1"/>
      <text:p text:style-name="P1"/>
      <text:p text:style-name="P1"/>
      <text:p text:style-name="P1"/>
      <text:p text:style-name="P1"/>
      <text:p text:style-name="P1"/>
      <text:list xml:id="list37750845" text:continue-numbering="true" text:style-name="Outline">
        <text:list-item>
          <text:list>
            <text:list-item>
              <text:list>
                <text:list-item>
                  <text:h text:style-name="P3" text:outline-level="3"><text:soft-page-break/>2.3 Potok Algorytmu</text:h>
                </text:list-item>
              </text:list>
            </text:list-item>
          </text:list>
        </text:list-item>
      </text:list>
      <text:p text:style-name="P1"><text:span text:style-name="T2">Wejście: Plik zawierający współrzędne miejsc pracy i domów</text:span></text:p>
      <text:p text:style-name="P1"/>
      <text:p text:style-name="P1"><text:span text:style-name="T2">Krok 1: Parsowanie Wejścia</text:span></text:p>
      <text:p text:style-name="P1"><text:span text:style-name="T2"><text:s text:c="4"/>├─ Czytaj współrzędne dla każdego typu materiału</text:span></text:p>
      <text:p text:style-name="P1"><text:span text:style-name="T2"><text:s text:c="4"/>├─ Parsuj pojemności</text:span></text:p>
      <text:p text:style-name="P1"><text:span text:style-name="T2"><text:s text:c="4"/>└─ Waliduj integralność danych</text:span></text:p>
      <text:p text:style-name="P1"/>
      <text:p text:style-name="P1"><text:span text:style-name="T2">Krok 2: Dla Każdego Typu Materiału i:</text:span></text:p>
      <text:p text:style-name="P1"><text:span text:style-name="T2"><text:s text:c="4"/>├─ Skonstruuj graf dwudzielny G_i</text:span></text:p>
      <text:p text:style-name="P1"><text:span text:style-name="T2"><text:s text:c="4"/>├─ Wykonaj MCMF(G_i, źródło, ujście)</text:span></text:p>
      <text:p text:style-name="P1"><text:span text:style-name="T2"><text:s text:c="4"/>│ <text:s text:c="2"/>├─ Inicjalizuj graf rezidualny</text:span></text:p>
      <text:p text:style-name="P1"><text:span text:style-name="T2"><text:s text:c="4"/>│ <text:s text:c="2"/>├─ Powtarzaj, aż brak ścieżki powiększającej:</text:span></text:p>
      <text:p text:style-name="P1"><text:span text:style-name="T2"><text:s text:c="4"/>│ <text:s text:c="2"/>│ <text:s text:c="2"/>├─ Uruchom SPFA do znalezienia ścieżki min-cost</text:span></text:p>
      <text:p text:style-name="P1"><text:span text:style-name="T2"><text:s text:c="4"/>│ <text:s text:c="2"/>│ <text:s text:c="2"/>├─ Oblicz pojemność wąskiego gardła</text:span></text:p>
      <text:p text:style-name="P1"><text:span text:style-name="T2"><text:s text:c="4"/>│ <text:s text:c="2"/>│ <text:s text:c="2"/>└─ Zaktualizuj pojemności rezydualne</text:span></text:p>
      <text:p text:style-name="P1"><text:span text:style-name="T2"><text:s text:c="4"/>│ <text:s text:c="2"/>└─ Zwróć minimalny koszt</text:span></text:p>
      <text:p text:style-name="P1"><text:span text:style-name="T2"><text:s text:c="4"/>├─ Wyekstrahuj przydzielenie z grafu rezidualnego</text:span></text:p>
      <text:p text:style-name="P1"><text:span text:style-name="T2"><text:s text:c="4"/>│ <text:s text:c="2"/>└─ Dla każdego domu, znaleźć krawędź do miejsca pracy z pojemnością=0</text:span></text:p>
      <text:p text:style-name="P1"><text:span text:style-name="T2"><text:s text:c="4"/>└─ Wynik przydzielania</text:span></text:p>
      <text:p text:style-name="P1"/>
      <text:p text:style-name="P1"><text:span text:style-name="T2">Krok 3: Generowanie Wizualizacji</text:span></text:p>
      <text:p text:style-name="P1"><text:span text:style-name="T2"><text:s text:c="4"/>└─ Wyświetl miejsca pracy, domy i przydzielenia na 3D mapie</text:span></text:p>
      <text:p text:style-name="P1"/>
      <text:p text:style-name="P1"/>
      <text:p text:style-name="P1"/>
      <text:list xml:id="list37736493" text:continue-numbering="true" text:style-name="Outline">
        <text:list-item>
          <text:list>
            <text:list-item>
              <text:h text:style-name="P6" text:outline-level="2">3. Formalne Dowody Poprawności</text:h>
            </text:list-item>
          </text:list>
        </text:list-item>
      </text:list>
      <text:p text:style-name="P1"/>
      <text:list xml:id="list37739089" text:continue-numbering="true" text:style-name="Outline">
        <text:list-item>
          <text:list>
            <text:list-item>
              <text:list>
                <text:list-item>
                  <text:h text:style-name="P3" text:outline-level="3">3.1 Twierdzenie 1: Poprawność Konstruowania Grafu</text:h>
                </text:list-item>
              </text:list>
            </text:list-item>
          </text:list>
        </text:list-item>
      </text:list>
      <text:p text:style-name="P1"/>
      <text:p text:style-name="P1"><text:span text:style-name="T1">Twierdzenie:</text:span> Graf dwudzielny G_i prawidłowo modeluje problem przydzielenia dla każdego typu materiału.</text:p>
      <text:p text:style-name="P1"/>
      <text:p text:style-name="P1"><text:span text:style-name="T1">Dowód:</text:span></text:p>
      <text:p text:style-name="P1"/>
      <text:p text:style-name="P1"><text:span text:style-name="T1">Definicja:</text:span> Graf G_i jest poprawny wtedy i tylko wtedy, gdy:</text:p>
      <text:list xml:id="list37732672" text:continue-numbering="true" text:style-name="Outline">
        <text:list-item>
          <text:p text:style-name="P5">Każde prawidłowe przydzielenie w pierwotnym problemie odpowiada rozwiązaniu MCMF w G_i</text:p>
        </text:list-item>
        <text:list-item>
          <text:p text:style-name="P5">Każde rozwiązanie MCMF w G_i odpowiada prawidłowemu przydzieleniu w pierwotnym problemie</text:p>
        </text:list-item>
      </text:list>
      <text:p text:style-name="P1"/>
      <text:p text:style-name="P1"><text:span text:style-name="T1">Dowód (1):</text:span> Prawidłowe przydzielenie → Rozwiązanie MCMF</text:p>
      <text:p text:style-name="P1"/>
      <text:p text:style-name="P1">Niech A będzie prawidłowym przydzieleniem. Zdefiniuj przepływ f<text:span text:style-name="T4">A na G</text:span>i:</text:p>
      <text:p text:style-name="P1"><text:span text:style-name="T2">f_A(źródło, h_j) = 1 <text:s/>∀j ∈ [1, |H_i|]</text:span></text:p>
      <text:p text:style-name="P1"><text:span text:style-name="T2">f_A(h_j, w_k) = 1 jeśli A(h_j) = w_k, inaczej 0</text:span></text:p>
      <text:p text:style-name="P1"><text:span text:style-name="T2">f_A(w_k, ujście) = |{h : A(h) = w_k}| ∀k ∈ [1, |W_i|]</text:span></text:p>
      <text:p text:style-name="P1"/>
      <text:p text:style-name="P1">Weryfikujemy, że to jest prawidłowy przepływ:</text:p>
      <text:p text:style-name="P1"/>
      <text:list xml:id="list37731021" text:continue-numbering="true" text:style-name="Outline">
        <text:list-item>
          <text:p text:style-name="P5"><text:span text:style-name="T1">Zachowanie przepływu w węzłach domu (h_j):</text:span></text:p>
        </text:list-item>
      </text:list>
      <text:p text:style-name="P1"><text:span text:style-name="T2"><text:s text:c="3"/>Przepływ wchodzący = f_A(źródło, h_j) = 1</text:span></text:p>
      <text:p text:style-name="P1"><text:span text:style-name="T2"><text:s text:c="3"/>Przepływ wychodzący = ∑_k f_A(h_j, w_k) = 1 (dokładnie jedna krawędź wychodzącajest jedynka)</text:span></text:p>
      <text:p text:style-name="P1"><text:span text:style-name="T2"><text:s text:c="3"/>Przepływ wchodzący = Przepływ wychodzący ✓</text:span></text:p>
      <text:p text:style-name="P1"/>
      <text:list xml:id="list37734348" text:continue-numbering="true" text:style-name="Outline">
        <text:list-item>
          <text:p text:style-name="P5"><text:span text:style-name="T1">Zachowanie przepływu w węzłach miejsca pracy (w_k):</text:span></text:p>
        </text:list-item>
      </text:list>
      <text:p text:style-name="P1"><text:span text:style-name="T2"><text:s text:c="3"/>Przepływ wchodzący = ∑_j f_A(h_j, w_k) = liczba domów przydzielonych do w_k</text:span></text:p>
      <text:p text:style-name="P1"><text:span text:style-name="T2"><text:s text:c="3"/>Przepływ wychodzący = f_A(w_k, ujście) = liczba domów przydzielonych do w_k (z definicji)</text:span></text:p>
      <text:p text:style-name="P1"><text:span text:style-name="T2"><text:s text:c="3"/>Przepływ wchodzący = Przepływ wychodzący ✓</text:span></text:p>
      <text:p text:style-name="P1"/>
      <text:list xml:id="list37742037" text:continue-numbering="true" text:style-name="Outline">
        <text:list-item>
          <text:p text:style-name="P5"><text:span text:style-name="T1">Ograniczenia pojemności:</text:span></text:p>
        </text:list-item>
      </text:list>
      <text:p text:style-name="P4">Krawędzie źródła: f_A ≤ 1 (dokładnie jeden na dom) ✓</text:p>
      <text:p text:style-name="P4">Krawędzie dom-do-miejsca<text:span text:style-name="T4">pracy: f</text:span>A ≤ 1 (przydzielenie jeden-do-jednego) ✓</text:p>
      <text:p text:style-name="P4">Krawędzie miejsca<text:span text:style-name="T4">pracy-do-ujścia: f</text:span>A ≤ pojemność (ograniczenie prawidłowości) ✓</text:p>
      <text:p text:style-name="P1"/>
      <text:p text:style-name="P1"/>
      <text:list xml:id="list37742303" text:continue-numbering="true" text:style-name="Outline">
        <text:list-item>
          <text:p text:style-name="P5"><text:soft-page-break/><text:span text:style-name="T1">Równoważność kosztów:</text:span></text:p>
        </text:list-item>
      </text:list>
      <text:p text:style-name="P1"><text:span text:style-name="T2"><text:s text:c="3"/>Koszt(f_A) = ∑_j ∑_k f_A(h_j, w_k) × koszt(h_j, w_k)</text:span></text:p>
      <text:p text:style-name="P1"><text:span text:style-name="T2"><text:s text:c="14"/>= ∑_j koszt(h_j, A(h_j))</text:span></text:p>
      <text:p text:style-name="P1"><text:span text:style-name="T2"><text:s text:c="14"/>= Koszt(A) ✓</text:span></text:p>
      <text:p text:style-name="P1"/>
      <text:p text:style-name="P1"><text:span text:style-name="T1">Dowód (2):</text:span> Rozwiązanie MCMF → Prawidłowe przydzielenie</text:p>
      <text:p text:style-name="P1"/>
      <text:p text:style-name="P1">Niech f będzie maksymalnym przepływem w G<text:span text:style-name="T4">i. Zdefiniuj przydzielenie A</text:span>f:</text:p>
      <text:p text:style-name="P1"><text:span text:style-name="T2">Dla każdego domu h_j:</text:span></text:p>
      <text:p text:style-name="P1"><text:span text:style-name="T2"><text:s text:c="4"/>Niech w_k będzie unikalnym miejscem pracy gdzie f(h_j, w_k) &gt; 0</text:span></text:p>
      <text:p text:style-name="P1"><text:span text:style-name="T2"><text:s text:c="4"/>Ustaw A_f(h_j) = w_k</text:span></text:p>
      <text:p text:style-name="P1"/>
      <text:p text:style-name="P1">To jest dobrze zdefiniowane ponieważ:</text:p>
      <text:p text:style-name="P4">Zachowanie przepływu zapewnia dokładnie jedną krawędź wychodzącą z każdego h_j z dodatnim przepływem</text:p>
      <text:p text:style-name="P4">Przez ograniczenia pojemności, |{h : A<text:span text:style-name="T4">f(h) = w</text:span>k}| ≤ f(w<text:span text:style-name="T4">k, ujście) ≤ pojemność(w</text:span>k)</text:p>
      <text:p text:style-name="P1"/>
      <text:p text:style-name="P1">Zatem, A<text:span text:style-name="T4">f jest prawidłowym przydzieleniem z Koszt(A</text:span>f) = Koszt(f). ✓</text:p>
      <text:p text:style-name="P1"/>
      <text:p text:style-name="P1"><text:span text:style-name="T1">Wniosek:</text:span> Konstruowanie grafu jest poprawne. ∎</text:p>
      <text:p text:style-name="P1"/>
      <text:list xml:id="list37753809" text:continue-numbering="true" text:style-name="Outline">
        <text:list-item>
          <text:list>
            <text:list-item>
              <text:list>
                <text:list-item>
                  <text:h text:style-name="P3" text:outline-level="3">3.2 Twierdzenie 2: Poprawność SPFA</text:h>
                </text:list-item>
              </text:list>
            </text:list-item>
          </text:list>
        </text:list-item>
      </text:list>
      <text:p text:style-name="P1"/>
      <text:p text:style-name="P1"><text:span text:style-name="T1">Twierdzenie:</text:span> Algorytm SPFA(G, źródło, ujście) prawidłowo oblicza najkrótsze ścieżki ze źródła do wszystkich wierzchołków.</text:p>
      <text:p text:style-name="P1"/>
      <text:p text:style-name="P1"><text:span text:style-name="T1">Dowód Przez Utrzymanie Niezmiennika:</text:span></text:p>
      <text:p text:style-name="P1"/>
      <text:p text:style-name="P1"><text:span text:style-name="T1">Niezmiennik I1:</text:span> Po każdej iteracji, <text:span text:style-name="T3">dist[v]</text:span> jest odległością najkrótszej ścieżki ze źródła do v biorąc pod uwagę tylko do tej pory zbadane krawędzie.</text:p>
      <text:p text:style-name="P1"/>
      <text:p text:style-name="P1"><text:span text:style-name="T1">Niezmiennik I2:</text:span> Jeśli <text:span text:style-name="T3">dist[v]</text:span> jest skończone, <text:span text:style-name="T3">parent[v]</text:span> tworzy prawidłową najkrótszą ścieżkę z powrotem do źródła.</text:p>
      <text:p text:style-name="P1"/>
      <text:p text:style-name="P1"><text:span text:style-name="T1">Przypadek Bazowy:</text:span></text:p>
      <text:p text:style-name="P1"><text:span text:style-name="T2">dist[źródło] = 0, dist[v] = ∞ dla v ≠ źródło</text:span></text:p>
      <text:p text:style-name="P1"><text:span text:style-name="T2">- I1 zachodzi: odległość źródła do źródła to 0, żadne inne ścieżki nie zostały zbadane</text:span></text:p>
      <text:p text:style-name="P1"><text:span text:style-name="T2">- I2 zachodzi: źródło nie ma rodzica (prawidłowe)</text:span></text:p>
      <text:p text:style-name="P1"/>
      <text:p text:style-name="P1"><text:span text:style-name="T1">Krok Indukcyjny:</text:span></text:p>
      <text:p text:style-name="P1"/>
      <text:p text:style-name="P1">Załóżmy I1 i I2 przed iteracją k. W iteracji k:</text:p>
      <text:p text:style-name="P4">Dequeue wierzchołek v z kolejki</text:p>
      <text:p text:style-name="P4">Dla każdej krawędzi (v, u) z pojemnością &gt; 0:</text:p>
      <text:p text:style-name="P4">Jeśli dist[v] + koszt(v,u) &lt; dist[u]:</text:p>
      <text:p text:style-name="P4">Zaktualizuj dist[u] = dist[v] + koszt(v,u)</text:p>
      <text:p text:style-name="P4">Ustaw parent[u] = v</text:p>
      <text:p text:style-name="P4">Enqueue u jeśli już nie jest w kolejce</text:p>
      <text:p text:style-name="P1"/>
      <text:p text:style-name="P1"><text:span text:style-name="T1">Dowód I1 jest utrzymywany:</text:span></text:p>
      <text:p text:style-name="P1"/>
      <text:p text:style-name="P1">Przez właściwość relaksacji algorytmów najkrótszej ścieżki:</text:p>
      <text:p text:style-name="P4">Jeśli istnieje krótsza ścieżka do u, musi przejść przez v w pewnym punkcie</text:p>
      <text:p text:style-name="P4">Gdy relaksujemy krawędź (v,u), testujemy wszystkie ścieżki v→u</text:p>
      <text:p text:style-name="P4">Nowa wartość dist[u] = dist[v] + koszt(v,u) jest najkrótszą ścieżką biorąc pod uwagę zbadane do tej pory krawędzie</text:p>
      <text:p text:style-name="P4">Zatem, I1 jest utrzymywany ✓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Dowód I2 jest utrzymywany:</text:span></text:p>
      <text:p text:style-name="P1"/>
      <text:p text:style-name="P1">Jeśli dist[u] jest skończone po relaksacji:</text:p>
      <text:p text:style-name="P4">dist[u] = dist[v] + koszt(v,u) gdzie v = parent[u]</text:p>
      <text:p text:style-name="P4">Przez I1 (hipoteza indukcyjna), dist[v] jest najkrótszą odległością do v</text:p>
      <text:p text:style-name="P4">Zatem, dist[u] jest najkrótszą ścieżką do u z prawidłowo ustawionym parent[u]</text:p>
      <text:p text:style-name="P4">I2 jest utrzymywany ✓</text:p>
      <text:p text:style-name="P1"/>
      <text:p text:style-name="P1"><text:span text:style-name="T1">Warunek Zakończenia:</text:span></text:p>
      <text:p text:style-name="P1"/>
      <text:p text:style-name="P1">Algorytm kończy się, gdy kolejka jest pusta. W tym punkcie:</text:p>
      <text:p text:style-name="P4">I1 zapewnia dist[ujście] równa odległości najkrótszej ścieżki do ujścia</text:p>
      <text:p text:style-name="P4">I2 zapewnia parent[] koduje najkrótszą ścieżkę</text:p>
      <text:p text:style-name="P4">Poprawność jest ustalona ✓</text:p>
      <text:p text:style-name="P1"/>
      <text:p text:style-name="P1"><text:span text:style-name="T1">Wniosek:</text:span> SPFA prawidłowo oblicza najkrótsze ścieżki. ∎</text:p>
      <text:p text:style-name="P1"/>
      <text:list xml:id="list37746845" text:continue-numbering="true" text:style-name="Outline">
        <text:list-item>
          <text:list>
            <text:list-item>
              <text:list>
                <text:list-item>
                  <text:h text:style-name="P3" text:outline-level="3">3.3 Twierdzenie 3: Optymalność Min-Cost Max-Flow</text:h>
                </text:list-item>
              </text:list>
            </text:list-item>
          </text:list>
        </text:list-item>
      </text:list>
      <text:p text:style-name="P1"/>
      <text:p text:style-name="P1"><text:span text:style-name="T1">Twierdzenie:</text:span> Algorytm MCMF(G, źródło, ujście) zwraca minimalny koszt wśród wszystkich maksymalnych przepływów.</text:p>
      <text:p text:style-name="P1"/>
      <text:p text:style-name="P1"><text:span text:style-name="T1">Dowód:</text:span></text:p>
      <text:p text:style-name="P1"/>
      <text:p text:style-name="P1"><text:span text:style-name="T1">Lemat Kluczowy (Successive Shortest Paths):</text:span> Jeśli wielokrotnie powiększamy przepływ wzdłuż ścieżek o minimalnym koszcie powiększających, ostateczny przepływ jest minimalnym kosztem maksymalnego przepływu.</text:p>
      <text:p text:style-name="P1"/>
      <text:p text:style-name="P1"><text:span text:style-name="T1">Dowód Lematu:</text:span></text:p>
      <text:p text:style-name="P1"/>
      <text:p text:style-name="P1">Niech f będzie dowolnym maksymalnym przepływem. Dowodzimy koszt(f_MCMF) ≤ koszt(f).</text:p>
      <text:p text:style-name="P1"/>
      <text:p text:style-name="P1">Zdefiniuj: Dla każdej jednostki przepływu, koszt jest sumą kosztów krawędzi wzdłuż jej ścieżki.</text:p>
      <text:p text:style-name="P1"/>
      <text:p text:style-name="P1"><text:span text:style-name="T1">Optymalność Przez Argument Wymiany:</text:span></text:p>
      <text:p text:style-name="P1"/>
      <text:p text:style-name="P1">Załóżmy f<text:span text:style-name="T4">MCMF nie jest optymalne. Wtedy ∃f z koszt(f) &lt; koszt(f</text:span>MCMF).</text:p>
      <text:p text:style-name="P1"/>
      <text:p text:style-name="P1">Rozważ różnicę symetryczną Δ = f - f_MCMF:</text:p>
      <text:p text:style-name="P4">Δ jest cyrkulacją (bez wejść/wyjść źródła)</text:p>
      <text:p text:style-name="P4">Δ może być rozłożone na cykle elementarne</text:p>
      <text:p text:style-name="P1"/>
      <text:p text:style-name="P1">Niech C będzie cyklem o ujemnym koszcie w tym rozkładzie:</text:p>
      <text:p text:style-name="P4">Przez poprawność SPFA, żaden cykl ujemny nie istnieje w grafie rezidualnym</text:p>
      <text:p text:style-name="P4">Zatem, żaden ujemny cykl nie istnieje w grafie rezidualnym po MCMF</text:p>
      <text:p text:style-name="P4">Sprzeczność! ✓</text:p>
      <text:p text:style-name="P1"/>
      <text:p text:style-name="P1">Zatem, f_MCMF ma minimalny koszt. ∎</text:p>
      <text:p text:style-name="P1"/>
      <text:p text:style-name="P1"><text:span text:style-name="T1">Poprawność Algorytmu:</text:span></text:p>
      <text:p text:style-name="P1"><text:span text:style-name="T2">Algorytm MCMF:</text:span></text:p>
      <text:p text:style-name="P1"><text:span text:style-name="T2"><text:s text:c="4"/>while SPFA(grafRezidualny, źródło, ujście):</text:span></text:p>
      <text:p text:style-name="P1"><text:span text:style-name="T2"><text:s text:c="8"/>Oblicz przepływ wąskiego gardła wzdłuż znalezionej ścieżki</text:span></text:p>
      <text:p text:style-name="P1"><text:span text:style-name="T2"><text:s text:c="8"/>Powiększ przepływ</text:span></text:p>
      <text:p text:style-name="P1"><text:span text:style-name="T2"><text:s text:c="8"/>Zaktualizuj graf rezidualny</text:span></text:p>
      <text:p text:style-name="P1"/>
      <text:p text:style-name="P1"><text:span text:style-name="T2">Poprawność:</text:span></text:p>
      <text:p text:style-name="P1"><text:span text:style-name="T2"><text:s text:c="4"/>1. SPFA znajduje ścieżkę powiększającą minimalny koszt (Twierdzenie 2)</text:span></text:p>
      <text:p text:style-name="P1"><text:span text:style-name="T2"><text:s text:c="4"/>2. Każde powiększenie zachowuje właściwość minimalnego kosztu (Lemat)</text:span></text:p>
      <text:p text:style-name="P1"><text:span text:style-name="T2"><text:s text:c="4"/>3. Zakończenie gdy brak ścieżki powiększającej = maksymalny przepływ</text:span></text:p>
      <text:p text:style-name="P1"><text:span text:style-name="T2"><text:s text:c="4"/>4. Zatem: Ostateczny przepływ to minimalny koszt maksymalny przepływ ✓</text:span></text:p>
      <text:p text:style-name="P1"/>
      <text:p text:style-name="P1"><text:soft-page-break/><text:span text:style-name="T1">Wniosek:</text:span> Algorytm MCMF zwraca minimalny koszt maksymalny przepływ. ∎</text:p>
      <text:p text:style-name="P1"/>
      <text:list xml:id="list37737607" text:continue-numbering="true" text:style-name="Outline">
        <text:list-item>
          <text:list>
            <text:list-item>
              <text:list>
                <text:list-item>
                  <text:h text:style-name="P3" text:outline-level="3">3.4 Twierdzenie 4: Poprawność Wypukłej Otoczki</text:h>
                </text:list-item>
              </text:list>
            </text:list-item>
          </text:list>
        </text:list-item>
      </text:list>
      <text:p text:style-name="P1"/>
      <text:p text:style-name="P1"><text:span text:style-name="T1">Twierdzenie:</text:span> Algorytm CONVEX_HULL(punkty) zwraca minimalny wielokąt wypukły zawierający wszystkie punkty.</text:p>
      <text:p text:style-name="P1"/>
      <text:p text:style-name="P1"><text:span text:style-name="T1">Dowód:</text:span></text:p>
      <text:p text:style-name="P1"/>
      <text:p text:style-name="P1"><text:span text:style-name="T1">Definicja Poprawności:</text:span> Wyjście H jest prawidłowe wtedy i tylko wtedy, gdy:</text:p>
      <text:list xml:id="list37747508" text:continue-numbering="true" text:style-name="Outline">
        <text:list-item>
          <text:p text:style-name="P5">H jest wielokątem prostym (nie samoprzecinającym się)</text:p>
        </text:list-item>
        <text:list-item>
          <text:p text:style-name="P5">Wszystkie punkty wejściowe są zawarte w lub na granicy H</text:p>
        </text:list-item>
        <text:list-item>
          <text:p text:style-name="P5">H jest minimalne (żaden prawidłowy podzbiór nie jest również wypukły i zawiera wszystkie punkty)</text:p>
        </text:list-item>
      </text:list>
      <text:p text:style-name="P1"/>
      <text:p text:style-name="P1"><text:span text:style-name="T1">Dowód (1): H jest Wielokątem Prostym</text:span></text:p>
      <text:p text:style-name="P1"/>
      <text:p text:style-name="P1">Algorytm utrzymuje niezmiennik, że bieżąca otoczka nie ma kolinearności wewnętrznych:</text:p>
      <text:p text:style-name="P1"><text:span text:style-name="T2">Test iloczynu wektorowego: det(p_prev, p_top, p_next) &gt; 0</text:span></text:p>
      <text:p text:style-name="P1"><text:span text:style-name="T2">To zapewnia skręt w lewo w każdym wierzchołku (właściwość wielokąta prostego)</text:span></text:p>
      <text:p text:style-name="P1"/>
      <text:p text:style-name="P1">Gdy usuwamy p<text:span text:style-name="T4">top i sprawdzamy p</text:span>prev:</text:p>
      <text:p text:style-name="P1"><text:span text:style-name="T2">Jeśli det(p_prev_prev, p_prev, p_next) ≤ 0:</text:span></text:p>
      <text:p text:style-name="P1"><text:span text:style-name="T2"><text:s text:c="4"/>Usuwamy p_prev aby przywrócić właściwość skrętu w lewo</text:span></text:p>
      <text:p text:style-name="P1"/>
      <text:p text:style-name="P1">To iteracyjne usuwanie zapewnia, że żadne trzy kolejne punkty nie są kolinearne lub tworzą skręt w prawo.</text:p>
      <text:p text:style-name="P1">Zatem, H jest wielokątem prostym. ✓</text:p>
      <text:p text:style-name="P1"/>
      <text:p text:style-name="P1"><text:span text:style-name="T1">Dowód (2): Wszystkie Punkty Zawarte</text:span></text:p>
      <text:p text:style-name="P1"/>
      <text:p text:style-name="P1">Z konstrukcji:</text:p>
      <text:p text:style-name="P4">p0 jest najniżej-prawo położonym punktem (definitywnie na granicy otoczki)</text:p>
      <text:p text:style-name="P4">Wszystkie inne punkty są przetwarzane w rosnącym porządku kąta polarnego</text:p>
      <text:p text:style-name="P4">Dla każdego punktu, albo go dodajemy do otoczki albo weryfikujemy, że nie jest wierzchołkiem</text:p>
      <text:p text:style-name="P4">Punkty ściśle wewnątrz nie spełniłyby porządku kąta polarnego dla wierzchołków otoczki</text:p>
      <text:p text:style-name="P4">Zatem, wszystkie punkty wejściowe są zawarte ✓</text:p>
      <text:p text:style-name="P1"/>
      <text:p text:style-name="P1"><text:span text:style-name="T1">Dowód (3): H jest Minimalne</text:span></text:p>
      <text:p text:style-name="P1"/>
      <text:p text:style-name="P1">Załóżmy H nie jest minimalne. Wtedy ∃H' ⊂ H (prawidłowy podzbiór) który jest wypukły i zawiera wszystkie punkty.</text:p>
      <text:p text:style-name="P1"/>
      <text:p text:style-name="P1">To oznacza ∃v ∈ H taki, że v nie jest wierzchołkiem wypukłej otoczki wejścia.</text:p>
      <text:p text:style-name="P1"/>
      <text:p text:style-name="P1">Ale przez Twierdzenie 2 teorii wypukłej otoczki:</text:p>
      <text:p text:style-name="P4">v jest punktem ekstremalnym (nie może być napisany jako kombinacja wypukła innych punktów)</text:p>
      <text:p text:style-name="P4">Zatem, v musi być wierzchołkiem wypukłej otoczki</text:p>
      <text:p text:style-name="P1"/>
      <text:p text:style-name="P1">Sprzeczność! Zatem, H jest minimalne. ✓</text:p>
      <text:p text:style-name="P1"/>
      <text:p text:style-name="P1"><text:span text:style-name="T1">Wniosek:</text:span> Algorytm zwraca minimalny wielokąt wypukły. ∎</text:p>
      <text:p text:style-name="P1"/>
      <text:p text:style-name="P1"/>
      <text:p text:style-name="P1"/>
      <text:p text:style-name="P1"/>
      <text:p text:style-name="P1"/>
      <text:list xml:id="list37751928" text:continue-numbering="true" text:style-name="Outline">
        <text:list-item>
          <text:list>
            <text:list-item>
              <text:h text:style-name="P6" text:outline-level="2">4. Weryfikacja Algorytmów</text:h>
            </text:list-item>
          </text:list>
        </text:list-item>
      </text:list>
      <text:p text:style-name="P1"/>
      <text:list xml:id="list37743496" text:continue-numbering="true" text:style-name="Outline">
        <text:list-item>
          <text:list>
            <text:list-item>
              <text:list>
                <text:list-item>
                  <text:h text:style-name="P3" text:outline-level="3">4.1 Weryfikacja Implementacji SPFA</text:h>
                </text:list-item>
              </text:list>
            </text:list-item>
          </text:list>
        </text:list-item>
      </text:list>
      <text:p text:style-name="P1"/>
      <text:p text:style-name="P1"><text:span text:style-name="T1">Lokalizacja:</text:span> <text:span text:style-name="T3">country::spfa()</text:span> linie 237-285</text:p>
      <text:p text:style-name="P1"/>
      <text:p text:style-name="P1"><text:soft-page-break/><text:span text:style-name="T1">Przegląd Kodu:</text:span></text:p>
      <text:p text:style-name="P1"><text:span text:style-name="T2">bool country::spfa(dynamicArray&lt;dynamicArray&lt;edge&gt;&gt;&amp; graf,</text:span></text:p>
      <text:p text:style-name="P1"><text:span text:style-name="T2"><text:s text:c="19"/>int64_t źródło, int64_t ujście,</text:span></text:p>
      <text:p text:style-name="P1"><text:span text:style-name="T2"><text:s text:c="19"/>dynamicArray&lt;double&gt;&amp; dist,</text:span></text:p>
      <text:p text:style-name="P1"><text:span text:style-name="T2"><text:s text:c="19"/>dynamicArray&lt;int64_t&gt;&amp; parentV,</text:span></text:p>
      <text:p text:style-name="P1"><text:span text:style-name="T2"><text:s text:c="19"/>dynamicArray&lt;int64_t&gt;&amp; parentE)</text:span></text:p>
      <text:p text:style-name="P1"/>
      <text:p text:style-name="P1"><text:span text:style-name="T1">Punkty Weryfikacji:</text:span></text:p>
      <text:p text:style-name="P1"/>
      <text:list xml:id="list37744081" text:continue-numbering="true" text:style-name="Outline">
        <text:list-item>
          <text:p text:style-name="P5">✓ <text:span text:style-name="T1">Inicjalizacja:</text:span></text:p>
        </text:list-item>
      </text:list>
      <text:p text:style-name="P4">dist[źródło] = 0, wszystkie inne = INF (1e100)</text:p>
      <text:p text:style-name="P4">Wszystkie wierzchołki zainicjalizowane w tablicach inQueue, dist, parentV</text:p>
      <text:p text:style-name="P4">Rozmiar = liczba wierzchołków w grafie</text:p>
      <text:p text:style-name="P1"/>
      <text:list xml:id="list37732588" text:continue-numbering="true" text:style-name="Outline">
        <text:list-item>
          <text:p text:style-name="P5">✓ <text:span text:style-name="T1">Zarządzanie Kolejką:</text:span></text:p>
        </text:list-item>
      </text:list>
      <text:p text:style-name="P4">źródło enqueued inicjalnie</text:p>
      <text:p text:style-name="P4">inQueue zapobiega duplikatom</text:p>
      <text:p text:style-name="P4">Elementy dequeued dokładnie raz</text:p>
      <text:p text:style-name="P1"/>
      <text:list xml:id="list37736813" text:continue-numbering="true" text:style-name="Outline">
        <text:list-item>
          <text:p text:style-name="P5">✓ <text:span text:style-name="T1">Relaksacja Krawędzi:</text:span></text:p>
        </text:list-item>
      </text:list>
      <text:p text:style-name="P4">Tylko krawędzie z pojemnością &gt; 0 rozpatrywane (zapobiega użyciu krawędzi wstecz przed powiększeniem przepływu)</text:p>
      <text:p text:style-name="P4">Warunek relaksacji: <text:span text:style-name="T3">dist[v] + koszt(v,u) &lt; dist[u]</text:span></text:p>
      <text:p text:style-name="P4">Tablice parent zaktualizowane prawidłowo</text:p>
      <text:p text:style-name="P1"/>
      <text:list xml:id="list37747746" text:continue-numbering="true" text:style-name="Outline">
        <text:list-item>
          <text:p text:style-name="P5">✓ <text:span text:style-name="T1">Zakończenie:</text:span></text:p>
        </text:list-item>
      </text:list>
      <text:p text:style-name="P4">Pętla kończy się gdy kolejka pusta</text:p>
      <text:p text:style-name="P4">Zwraca: <text:span text:style-name="T3">parentV[ujście] != -1</text:span> (ścieżka istnieje wtedy i tylko wtedy gdy ujście ma rodzica)</text:p>
      <text:p text:style-name="P1"/>
      <text:list xml:id="list37730894" text:continue-numbering="true" text:style-name="Outline">
        <text:list-item>
          <text:p text:style-name="P5">✓ <text:span text:style-name="T1">Złożoność Czasowa:</text:span></text:p>
        </text:list-item>
      </text:list>
      <text:p text:style-name="P4">Gorszy przypadek: O(VE) z V = rozmiar grafu, E = liczba krawędzi</text:p>
      <text:p text:style-name="P4">Praktycznie: Często znacznie lepiej bez cykli ujemnych</text:p>
      <text:p text:style-name="P1"/>
      <text:p text:style-name="P1"><text:span text:style-name="T1">Werdykt:</text:span> Implementacja poprawna. ✓</text:p>
      <text:p text:style-name="P1"/>
      <text:list xml:id="list37751842" text:continue-numbering="true" text:style-name="Outline">
        <text:list-item>
          <text:list>
            <text:list-item>
              <text:list>
                <text:list-item>
                  <text:h text:style-name="P3" text:outline-level="3">4.2 Weryfikacja Implementacji Min-Cost Max-Flow</text:h>
                </text:list-item>
              </text:list>
            </text:list-item>
          </text:list>
        </text:list-item>
      </text:list>
      <text:p text:style-name="P1"/>
      <text:p text:style-name="P1"><text:span text:style-name="T1">Lokalizacja:</text:span> <text:span text:style-name="T3">country::minCostMaxFlow()</text:span> linie 287-315</text:p>
      <text:p text:style-name="P1"/>
      <text:p text:style-name="P1"><text:span text:style-name="T1">Przegląd Kodu:</text:span></text:p>
      <text:p text:style-name="P1"><text:span text:style-name="T2">double country::minCostMaxFlow(dynamicArray&lt;dynamicArray&lt;edge&gt;&gt;&amp; graf,</text:span></text:p>
      <text:p text:style-name="P1"><text:span text:style-name="T2"><text:s text:c="31"/>int64_t źródło,</text:span></text:p>
      <text:p text:style-name="P1"><text:span text:style-name="T2"><text:s text:c="31"/>int64_t ujście)</text:span></text:p>
      <text:p text:style-name="P1"/>
      <text:p text:style-name="P1"><text:span text:style-name="T1">Punkty Weryfikacji:</text:span></text:p>
      <text:p text:style-name="P1"/>
      <text:list xml:id="list37739536" text:continue-numbering="true" text:style-name="Outline">
        <text:list-item>
          <text:p text:style-name="P5">✓ <text:span text:style-name="T1">Zakończenie Wcześnie:</text:span> Sprawdza <text:span text:style-name="T3">źródło == ujście</text:span>, zwraca 0.0 (prawidłowe)</text:p>
        </text:list-item>
      </text:list>
      <text:p text:style-name="P1"/>
      <text:list xml:id="list37756094" text:continue-numbering="true" text:style-name="Outline">
        <text:list-item>
          <text:p text:style-name="P5">✓ <text:span text:style-name="T1">Pętla Powiększania Przepływu:</text:span></text:p>
        </text:list-item>
      </text:list>
      <text:p text:style-name="P1"><text:span text:style-name="T2"><text:s text:c="3"/>while(spfa(...)) <text:s/>// Powtarza podczas gdy istnieje ścieżka powiększająca</text:span></text:p>
      <text:p text:style-name="P1"/>
      <text:list xml:id="list37750594" text:continue-numbering="true" text:style-name="Outline">
        <text:list-item>
          <text:p text:style-name="P5">✓ <text:span text:style-name="T1">Obliczenie Wąskiego Gardła:</text:span></text:p>
        </text:list-item>
      </text:list>
      <text:p text:style-name="P1"><text:span text:style-name="T2"><text:s text:c="3"/>int64_t flow = INT64_MAX;</text:span></text:p>
      <text:p text:style-name="P1"><text:span text:style-name="T2"><text:s text:c="3"/>for(int64_t v = ujście; v != źródło; v = parentV[v]) {</text:span></text:p>
      <text:p text:style-name="P1"><text:span text:style-name="T2"><text:s text:c="7"/>if(pojemność(e) &lt; flow) flow = pojemność(e);</text:span></text:p>
      <text:p text:style-name="P1"><text:span text:style-name="T2"><text:s text:c="3"/>}</text:span></text:p>
      <text:p text:style-name="P4">Prawidłowo znajduje minimalną pojemność wzdłuż ścieżki</text:p>
      <text:p text:style-name="P1"/>
      <text:list xml:id="list37734467" text:continue-numbering="true" text:style-name="Outline">
        <text:list-item>
          <text:p text:style-name="P5">✓ <text:span text:style-name="T1">Aktualizacja Grafu Rezidualnego:</text:span></text:p>
        </text:list-item>
      </text:list>
      <text:p text:style-name="P1"><text:span text:style-name="T2"><text:s text:c="3"/>pojemność(e) -= flow; <text:s text:c="10"/>// Krawędź wprzód zmniejszona</text:span></text:p>
      <text:p text:style-name="P1"><text:span text:style-name="T2"><text:s text:c="3"/>pojemność(wstecz(e)) += flow; <text:s text:c="2"/>// Krawędź wstecz powiększona</text:span></text:p>
      <text:p text:style-name="P1"><text:span text:style-name="T2"><text:s text:c="3"/>całkowityKoszt += flow * koszt(e); <text:s text:c="2"/>// Koszt skumulowany</text:span></text:p>
      <text:p text:style-name="P4"><text:soft-page-break/>Prawidłowo utrzymuje niezmienniki grafu rezidualnego</text:p>
      <text:p text:style-name="P4">Indeks krawędzi wstecz przechowywany w krawędzi wprzód</text:p>
      <text:p text:style-name="P1"/>
      <text:list xml:id="list37728526" text:continue-numbering="true" text:style-name="Outline">
        <text:list-item>
          <text:p text:style-name="P5">✓ <text:span text:style-name="T1">Wynik Końcowy:</text:span> Zwraca całkowity koszt jako cel optymalizacji</text:p>
        </text:list-item>
      </text:list>
      <text:p text:style-name="P1"/>
      <text:p text:style-name="P1"><text:span text:style-name="T1">Werdykt:</text:span> Implementacja poprawna. ✓</text:p>
      <text:p text:style-name="P1"/>
      <text:list xml:id="list37726978" text:continue-numbering="true" text:style-name="Outline">
        <text:list-item>
          <text:list>
            <text:list-item>
              <text:list>
                <text:list-item>
                  <text:h text:style-name="P3" text:outline-level="3">4.3 Weryfikacja Ekstrakcji Przydzielenia</text:h>
                </text:list-item>
              </text:list>
            </text:list-item>
          </text:list>
        </text:list-item>
      </text:list>
      <text:p text:style-name="P1"/>
      <text:p text:style-name="P1"><text:span text:style-name="T1">Lokalizacja:</text:span> <text:span text:style-name="T3">country::assignDwarfsToWorkplaces()</text:span> linie 329-405</text:p>
      <text:p text:style-name="P1"/>
      <text:p text:style-name="P1"><text:span text:style-name="T1">Punkty Weryfikacji:</text:span></text:p>
      <text:p text:style-name="P1"/>
      <text:list xml:id="list37730591" text:continue-numbering="true" text:style-name="Outline">
        <text:list-item>
          <text:p text:style-name="P5">✓ <text:span text:style-name="T1">Konstruowanie Grafu:</text:span> Tworzy prawidłowy graf dwudzielny dla każdego typu materiału</text:p>
        </text:list-item>
      </text:list>
      <text:p text:style-name="P1"/>
      <text:list xml:id="list37752839" text:continue-numbering="true" text:style-name="Outline">
        <text:list-item>
          <text:p text:style-name="P5">✓ <text:span text:style-name="T1">Umiejscowienie Źródła/Ujścia:</text:span></text:p>
        </text:list-item>
      </text:list>
      <text:p text:style-name="P4">źródło = 0</text:p>
      <text:p text:style-name="P4">domy: 1 do |H_i|</text:p>
      <text:p text:style-name="P4">miejsca pracy: |H<text:span text:style-name="T4">i|+1 do |H</text:span>i|+|W_i|</text:p>
      <text:p text:style-name="P4">ujście = |H<text:span text:style-name="T4">i|+|W</text:span>i|+1</text:p>
      <text:p text:style-name="P1"/>
      <text:list xml:id="list37742604" text:continue-numbering="true" text:style-name="Outline">
        <text:list-item>
          <text:p text:style-name="P5">✓ <text:span text:style-name="T1">Tworzenie Krawędzi:</text:span></text:p>
        </text:list-item>
      </text:list>
      <text:p text:style-name="P4">źródło → dom_j: pojemność=1, koszt=0</text:p>
      <text:p text:style-name="P4">dom<text:span text:style-name="T4">j → miejsce</text:span>pracy_k: pojemność=1, koszt=odległość</text:p>
      <text:p text:style-name="P4">miejsce<text:span text:style-name="T4">pracy</text:span>k → ujście: pojemność=pojemność_miejsca, koszt=0</text:p>
      <text:p text:style-name="P1"/>
      <text:list xml:id="list37742723" text:continue-numbering="true" text:style-name="Outline">
        <text:list-item>
          <text:p text:style-name="P5">✓ <text:span text:style-name="T1">Ekstrakcja Przydzielenia:</text:span></text:p>
        </text:list-item>
      </text:list>
      <text:p text:style-name="P1"><text:span text:style-name="T2"><text:s text:c="3"/>dla każdego domu h_j:</text:span></text:p>
      <text:p text:style-name="P1"><text:span text:style-name="T2"><text:s text:c="7"/>szukaj krawędzi gdzie pojemność stała się 0 (wysłano przepływ)</text:span></text:p>
      <text:p text:style-name="P1"><text:span text:style-name="T2"><text:s text:c="7"/>przydziel h_j do odpowiadającego miejsca pracy</text:span></text:p>
      <text:p text:style-name="P4">Prawidłowo identyfikuje które jednostki przepływu były wysłane na które krawędzie</text:p>
      <text:p text:style-name="P1"/>
      <text:list xml:id="list37728635" text:continue-numbering="true" text:style-name="Outline">
        <text:list-item>
          <text:p text:style-name="P5">✓ <text:span text:style-name="T1">Format Wyjścia:</text:span></text:p>
        </text:list-item>
      </text:list>
      <text:p text:style-name="P4">Jedna linia na przydzielenie: <text:span text:style-name="T3">indeks_domu;indeks_miejsca_pracy</text:span></text:p>
      <text:p text:style-name="P4">Separator typu materiału: <text:span text:style-name="T3">;;</text:span></text:p>
      <text:p text:style-name="P1"/>
      <text:p text:style-name="P1"><text:span text:style-name="T1">Werdykt:</text:span> Implementacja poprawna. ✓</text:p>
      <text:p text:style-name="P1"/>
      <text:p text:style-name="P1"/>
      <text:p text:style-name="P1"/>
      <text:list xml:id="list37751760" text:continue-numbering="true" text:style-name="Outline">
        <text:list-item>
          <text:list>
            <text:list-item>
              <text:h text:style-name="P6" text:outline-level="2">5. Niezmienniki Struktur Danych</text:h>
            </text:list-item>
          </text:list>
        </text:list-item>
      </text:list>
      <text:p text:style-name="P1"/>
      <text:list xml:id="list37740739" text:continue-numbering="true" text:style-name="Outline">
        <text:list-item>
          <text:list>
            <text:list-item>
              <text:list>
                <text:list-item>
                  <text:h text:style-name="P3" text:outline-level="3">5.1 Niezmienniki DynamicArray</text:h>
                </text:list-item>
              </text:list>
            </text:list-item>
          </text:list>
        </text:list-item>
      </text:list>
      <text:p text:style-name="P1"/>
      <text:p text:style-name="P1"><text:span text:style-name="T1">Niezmiennik D1:</text:span> Właściwość Rozmiaru Tablicy</text:p>
      <text:p text:style-name="P1"><text:span text:style-name="T2">size ≥ lastIndex + 1</text:span></text:p>
      <text:p text:style-name="P1"/>
      <text:p text:style-name="P1"><text:span text:style-name="T2">Jeśli pusta: size &gt; 0 i lastIndex = -1</text:span></text:p>
      <text:p text:style-name="P1"><text:span text:style-name="T2">Jeśli zawiera n elementów: size ≥ n i lastIndex = n-1</text:span></text:p>
      <text:p text:style-name="P1"/>
      <text:p text:style-name="P1"><text:span text:style-name="T1">Niezmiennik D2:</text:span> Alokacja Pamięci</text:p>
      <text:p text:style-name="P1"><text:span text:style-name="T2">Wszystkie dostępy do array[i] dla i ∈ [0, lastIndex] są prawidłowe</text:span></text:p>
      <text:p text:style-name="P1"><text:span text:style-name="T2">array[i] dla i &gt; lastIndex są niezainicjalizowane ale zaalokowane</text:span></text:p>
      <text:p text:style-name="P1"/>
      <text:p text:style-name="P1"><text:span text:style-name="T1">Niezmiennik D3:</text:span> Strategia Wzrostu</text:p>
      <text:p text:style-name="P1"><text:span text:style-name="T2">Przy dołączaniu do pełnej tablicy (size == lastIndex + 1):</text:span></text:p>
      <text:p text:style-name="P1"><text:span text:style-name="T2"><text:s text:c="4"/>newSize = max(2 * oldSize, oldSize + 1)</text:span></text:p>
      <text:p text:style-name="P1"/>
      <text:p text:style-name="P1"><text:span text:style-name="T2">To zapewnia amortyzowaną złożoność O(1) dołączania:</text:span></text:p>
      <text:p text:style-name="P1"><text:span text:style-name="T2"><text:s text:c="4"/>Koszt₁ + Koszt₂ + ... + Koszt_n / n ≤ O(1)</text:span></text:p>
      <text:p text:style-name="P1"><text:soft-page-break/></text:p>
      <text:p text:style-name="P1"><text:span text:style-name="T1">Weryfikacja:</text:span></text:p>
      <text:p text:style-name="P4">✓ Niezmienniki utrzymywane w konstruktorze, dołączaniu, wstawianiu, usuwaniu</text:p>
      <text:p text:style-name="P4">✓ Semantyka kopiowania/przenoszenia zachowuje niezmienniki</text:p>
      <text:p text:style-name="P4">✓ <text:span text:style-name="T3">getLastIndex()</text:span> zwraca -1 dla pustej, n-1 dla n elementów</text:p>
      <text:p text:style-name="P1"/>
      <text:list xml:id="list37743560" text:continue-numbering="true" text:style-name="Outline">
        <text:list-item>
          <text:list>
            <text:list-item>
              <text:list>
                <text:list-item>
                  <text:h text:style-name="P3" text:outline-level="3">5.2 Niezmienniki Kolejki</text:h>
                </text:list-item>
              </text:list>
            </text:list-item>
          </text:list>
        </text:list-item>
      </text:list>
      <text:p text:style-name="P1"/>
      <text:p text:style-name="P1"><text:span text:style-name="T1">Niezmiennik Q1:</text:span> Porządek FIFO</text:p>
      <text:p text:style-name="P1"><text:span text:style-name="T2">Jeśli append(a), append(b), dequeue() → zwraca a</text:span></text:p>
      <text:p text:style-name="P1"/>
      <text:p text:style-name="P1"><text:span text:style-name="T2">Utrzymywany przez:</text:span></text:p>
      <text:p text:style-name="P1"><text:span text:style-name="T2">- Wskaźnik head na przodzie</text:span></text:p>
      <text:p text:style-name="P1"><text:span text:style-name="T2">- Wskaźnik tail na tyle</text:span></text:p>
      <text:p text:style-name="P1"><text:span text:style-name="T2">- Nowe elementy dodawane na tyle</text:span></text:p>
      <text:p text:style-name="P1"><text:span text:style-name="T2">- Elementy usuwane z przodu</text:span></text:p>
      <text:p text:style-name="P1"/>
      <text:p text:style-name="P1"><text:span text:style-name="T1">Niezmiennik Q2:</text:span> Odniesienie Cykliczne</text:p>
      <text:p text:style-name="P1"><text:span text:style-name="T2">node.next tworzy łańcuch listy powiązanej od head do tail</text:span></text:p>
      <text:p text:style-name="P1"><text:span text:style-name="T2">tail.next = nullptr (prawidłowe zakończenie)</text:span></text:p>
      <text:p text:style-name="P1"/>
      <text:p text:style-name="P1"><text:span text:style-name="T1">Weryfikacja:</text:span></text:p>
      <text:p text:style-name="P4">✓ Operacje zachowują strukturę listy powiązanej</text:p>
      <text:p text:style-name="P4">✓ <text:span text:style-name="T3">isEmpty()</text:span> sprawdza head == nullptr</text:p>
      <text:p text:style-name="P4">✓ Brak wycieków pamięci (destruktory prawidłowo czyścą)</text:p>
      <text:p text:style-name="P1"/>
      <text:list xml:id="list37735453" text:continue-numbering="true" text:style-name="Outline">
        <text:list-item>
          <text:list>
            <text:list-item>
              <text:list>
                <text:list-item>
                  <text:h text:style-name="P3" text:outline-level="3">5.3 Niezmienniki Struktury Danych Country</text:h>
                </text:list-item>
              </text:list>
            </text:list-item>
          </text:list>
        </text:list-item>
      </text:list>
      <text:p text:style-name="P1"/>
      <text:p text:style-name="P1"><text:span text:style-name="T1">Niezmiennik C1:</text:span> Organizacja Po Typie Materiału</text:p>
      <text:p text:style-name="P1"><text:span text:style-name="T2">workplaces jest dynamicArray z 6 dynamicArrays</text:span></text:p>
      <text:p text:style-name="P1"><text:span text:style-name="T2">workplaces[0] = miejsca pracy breadOre</text:span></text:p>
      <text:p text:style-name="P1"><text:span text:style-name="T2">workplaces[1] = miejsca pracy wood</text:span></text:p>
      <text:p text:style-name="P1"><text:span text:style-name="T2">...</text:span></text:p>
      <text:p text:style-name="P1"><text:span text:style-name="T2">workplaces[5] = miejsca pracy gardenGnomes</text:span></text:p>
      <text:p text:style-name="P1"/>
      <text:p text:style-name="P1"><text:span text:style-name="T2">Każdy element utrzymuje indeksy swoich jednostek</text:span></text:p>
      <text:p text:style-name="P1"/>
      <text:p text:style-name="P1"><text:span text:style-name="T1">Niezmiennik C2:</text:span> Dodatnie Indeksy</text:p>
      <text:p text:style-name="P1"><text:span text:style-name="T2">Dla każdego miejsca pracy w: w.index ≥ 0</text:span></text:p>
      <text:p text:style-name="P1"><text:span text:style-name="T2">Dla każdego domu h: h.index ≥ 0</text:span></text:p>
      <text:p text:style-name="P1"><text:span text:style-name="T2">Indeks jest unikalny w obrębie swojego typu materiału</text:span></text:p>
      <text:p text:style-name="P1"/>
      <text:p text:style-name="P1"><text:span text:style-name="T1">Niezmiennik C3:</text:span> Prawidłowe Współrzędne</text:p>
      <text:p text:style-name="P1"><text:span text:style-name="T2">Wszystkie współrzędne ∈ [-1, 1] (znormalizowane)</text:span></text:p>
      <text:p text:style-name="P1"><text:span text:style-name="T2">Lub rzeczywiste współrzędne gry ∈ [-1000, 1000]</text:span></text:p>
      <text:p text:style-name="P1"><text:span text:style-name="T2">Bez wartości NaN lub nieskończoności</text:span></text:p>
      <text:p text:style-name="P1"/>
      <text:p text:style-name="P1"><text:span text:style-name="T1">Weryfikacja:</text:span></text:p>
      <text:p text:style-name="P4">✓ Konstruktor inicjalizuje 6 pustych tablic</text:p>
      <text:p text:style-name="P4">✓ <text:span text:style-name="T3">constructFromFile()</text:span> utrzymuje indeksowanie i zakres</text:p>
      <text:p text:style-name="P4">✓ Debug print <text:span text:style-name="T3">dp()</text:span> waliduje integralność struktur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7751356" text:continue-numbering="true" text:style-name="Outline">
        <text:list-item>
          <text:list>
            <text:list-item>
              <text:h text:style-name="P6" text:outline-level="2"><text:soft-page-break/>6. Poprawność Integracji</text:h>
            </text:list-item>
          </text:list>
        </text:list-item>
      </text:list>
      <text:p text:style-name="P1"/>
      <text:list xml:id="list37734699" text:continue-numbering="true" text:style-name="Outline">
        <text:list-item>
          <text:list>
            <text:list-item>
              <text:list>
                <text:list-item>
                  <text:h text:style-name="P3" text:outline-level="3">6.1 Potok End-to-End</text:h>
                </text:list-item>
              </text:list>
            </text:list-item>
          </text:list>
        </text:list-item>
      </text:list>
      <text:p text:style-name="P1"/>
      <text:p text:style-name="P1"><text:span text:style-name="T1">Struktura Przypadku Testowego:</text:span></text:p>
      <text:p text:style-name="P1"/>
      <text:p text:style-name="P1">Weryfikacja formatu pliku wejściowego:</text:p>
      <text:p text:style-name="P1"><text:span text:style-name="T2">[Materiał 0 - miejsca pracy]</text:span></text:p>
      <text:p text:style-name="P1"><text:span text:style-name="T2">0.5;0.5;0.5;10</text:span></text:p>
      <text:p text:style-name="P1"><text:span text:style-name="T2">0.6;0.6;0.6;15</text:span></text:p>
      <text:p text:style-name="P1"><text:span text:style-name="T2">;;</text:span></text:p>
      <text:p text:style-name="P1"/>
      <text:p text:style-name="P1"><text:span text:style-name="T2">[Materiał 0 - domy]</text:span></text:p>
      <text:p text:style-name="P1"><text:span text:style-name="T2">0.51;0.51;0.51</text:span></text:p>
      <text:p text:style-name="P1"><text:span text:style-name="T2">0.61;0.61;0.61</text:span></text:p>
      <text:p text:style-name="P1"><text:span text:style-name="T2">;;</text:span></text:p>
      <text:p text:style-name="P1"/>
      <text:p text:style-name="P1"><text:span text:style-name="T2">... (powtórz dla materiałów 1-5)</text:span></text:p>
      <text:p text:style-name="P1"/>
      <text:p text:style-name="P1"><text:span text:style-name="T1">Oczekiwane Zachowanie:</text:span></text:p>
      <text:p text:style-name="P1"/>
      <text:list xml:id="list37756265" text:continue-numbering="true" text:style-name="Outline">
        <text:list-item>
          <text:p text:style-name="P5">Plik parsowany pomyślnie</text:p>
        </text:list-item>
        <text:list-item>
          <text:p text:style-name="P5">12 jednostek na materiał (dowolna liczba)</text:p>
        </text:list-item>
        <text:list-item>
          <text:p text:style-name="P5">Algorytm MCMF wykonywany</text:p>
        </text:list-item>
        <text:list-item>
          <text:p text:style-name="P5">Przydzielenie zapisane do pliku wyjściowego</text:p>
        </text:list-item>
        <text:list-item>
          <text:p text:style-name="P5">Każdy dom przydzielony dokładnie raz</text:p>
        </text:list-item>
        <text:list-item>
          <text:p text:style-name="P5">Żadne miejsce pracy nie przekracza pojemności</text:p>
        </text:list-item>
        <text:list-item>
          <text:p text:style-name="P5">Całkowity koszt zminimalizowany</text:p>
        </text:list-item>
      </text:list>
      <text:p text:style-name="P1"/>
      <text:list xml:id="list37730182" text:continue-numbering="true" text:style-name="Outline">
        <text:list-item>
          <text:list>
            <text:list-item>
              <text:list>
                <text:list-item>
                  <text:h text:style-name="P3" text:outline-level="3">6.2 Poprawność Transformacji Współrzędnych</text:h>
                </text:list-item>
              </text:list>
            </text:list-item>
          </text:list>
        </text:list-item>
      </text:list>
      <text:p text:style-name="P1"/>
      <text:p text:style-name="P1"><text:span text:style-name="T1">Normalizacja Wejścia:</text:span></text:p>
      <text:p text:style-name="P1"><text:span text:style-name="T2">double nx = (x * 2.0 - 1.0); <text:s/>// [0,1] → [-1,1]</text:span></text:p>
      <text:p text:style-name="P1"><text:span text:style-name="T2">double ny = (y * 2.0 - 1.0);</text:span></text:p>
      <text:p text:style-name="P1"><text:span text:style-name="T2">double nz = (z * 2.0 - 1.0);</text:span></text:p>
      <text:p text:style-name="P1"/>
      <text:p text:style-name="P1"><text:span text:style-name="T1">Transformacja Odwrotna:</text:span></text:p>
      <text:p text:style-name="P1"><text:span text:style-name="T2">double x_orig = (nx + 1.0) / 2.0; <text:s/>// [-1,1] → [0,1]</text:span></text:p>
      <text:p text:style-name="P1"/>
      <text:p text:style-name="P1"><text:span text:style-name="T1">Właściwości:</text:span></text:p>
      <text:p text:style-name="P4">✓ Bijektywna (mapowanie jeden-do-jednego)</text:p>
      <text:p text:style-name="P4">✓ Zachowująca odległość: d<text:span text:style-name="T4">znormalizowana(p1, p2) = d</text:span>oryginalna(p1, p2) × √(scale²)</text:p>
      <text:p text:style-name="P4">✓ Współczynnik skali stosuje się równomiernie (nie wpływa na optymalne przydzielenie)</text:p>
      <text:p text:style-name="P1"/>
      <text:list xml:id="list37750508" text:continue-numbering="true" text:style-name="Outline">
        <text:list-item>
          <text:list>
            <text:list-item>
              <text:list>
                <text:list-item>
                  <text:h text:style-name="P3" text:outline-level="3">6.3 Poprawność Wizualizacji</text:h>
                </text:list-item>
              </text:list>
            </text:list-item>
          </text:list>
        </text:list-item>
      </text:list>
      <text:p text:style-name="P1"/>
      <text:p text:style-name="P1"><text:span text:style-name="T1">Weryfikacja Projekcji:</text:span></text:p>
      <text:p text:style-name="P1"/>
      <text:p text:style-name="P1">Mapowanie przestrzeni świata → przestrzeń ekranu musi:</text:p>
      <text:list xml:id="list37738757" text:continue-numbering="true" text:style-name="Outline">
        <text:list-item>
          <text:p text:style-name="P5">✓ Być spójne (te same wejście → te same wyjście)</text:p>
        </text:list-item>
        <text:list-item>
          <text:p text:style-name="P5">✓ Zachowywać względne odległości (w przybliżeniu)</text:p>
        </text:list-item>
        <text:list-item>
          <text:p text:style-name="P5">✓ Prawidłowo obsługiwać projekcję 3D→2D</text:p>
        </text:list-item>
        <text:list-item>
          <text:p text:style-name="P5">✓ Respektować ograniczenia granic [0, SCREEN<text:span text:style-name="T4">WIDTH] × [0, SCREEN</text:span>HEIGHT]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37754255" text:continue-numbering="true" text:style-name="Outline">
        <text:list-item>
          <text:list>
            <text:list-item>
              <text:h text:style-name="P6" text:outline-level="2"><text:soft-page-break/>7. Strategia Walidacji Empirycznej</text:h>
            </text:list-item>
          </text:list>
        </text:list-item>
      </text:list>
      <text:p text:style-name="P1"/>
      <text:list xml:id="list37727336" text:continue-numbering="true" text:style-name="Outline">
        <text:list-item>
          <text:list>
            <text:list-item>
              <text:list>
                <text:list-item>
                  <text:h text:style-name="P3" text:outline-level="3">7.1 Przypadki Testów Jednostkowych</text:h>
                </text:list-item>
              </text:list>
            </text:list-item>
          </text:list>
        </text:list-item>
      </text:list>
      <text:p text:style-name="P1"/>
      <text:p text:style-name="P1"><text:span text:style-name="T1">Zestaw Testów A: Wypukła Otoczka</text:span></text:p>
      <text:p text:style-name="P1"><text:span text:style-name="T2">Test A1: Pojedynczy punkt → otoczka = {punkt}</text:span></text:p>
      <text:p text:style-name="P1"><text:span text:style-name="T2">Test A2: Punkty kolinearne → otoczka filtruje do skrajnych</text:span></text:p>
      <text:p text:style-name="P1"><text:span text:style-name="T2">Test A3: Trójkąt → otoczka = wierzchołki trójkąta</text:span></text:p>
      <text:p text:style-name="P1"><text:span text:style-name="T2">Test A4: Kwadrat → otoczka = 4 narożniki</text:span></text:p>
      <text:p text:style-name="P1"><text:span text:style-name="T2">Test A5: Gęsta chmura → otoczka zawiera tylko granicę</text:span></text:p>
      <text:p text:style-name="P1"/>
      <text:p text:style-name="P1"><text:span text:style-name="T1">Zestaw Testów B: Min-Cost Max-Flow</text:span></text:p>
      <text:p text:style-name="P1"><text:span text:style-name="T2">Test B1: Idealne dopasowanie (|H| = |W|, pojemność = 1 każde)</text:span></text:p>
      <text:p text:style-name="P1"><text:span text:style-name="T2"><text:s text:c="4"/>Oczekiwane: Wszystkie domy przydzielone, całkowity koszt = suma odległości</text:span></text:p>
      <text:p text:style-name="P1"/>
      <text:p text:style-name="P1"><text:span text:style-name="T2">Test B2: Nadmierna pojemność (sum(pojemność) &gt; |H|)</text:span></text:p>
      <text:p text:style-name="P1"><text:span text:style-name="T2"><text:s text:c="4"/>Oczekiwane: Wszystkie domy przydzielone do najbliższych miejsc pracy</text:span></text:p>
      <text:p text:style-name="P1"/>
      <text:p text:style-name="P1"><text:span text:style-name="T2">Test B3: Ograniczona pojemność (sum(pojemność) &lt; |H|)</text:span></text:p>
      <text:p text:style-name="P1"><text:span text:style-name="T2"><text:s text:c="4"/>Oczekiwane: Niektóre domy nieprzydzielone (jeśli niemożliwe)</text:span></text:p>
      <text:p text:style-name="P1"/>
      <text:p text:style-name="P1"><text:span text:style-name="T2">Test B4: Pojedynczy dom, pojedyncze miejsce pracy</text:span></text:p>
      <text:p text:style-name="P1"><text:span text:style-name="T2"><text:s text:c="4"/>Oczekiwane: Dom przydzielony, koszt = odległość</text:span></text:p>
      <text:p text:style-name="P1"/>
      <text:p text:style-name="P1"><text:span text:style-name="T1">Zestaw Testów C: SPFA</text:span></text:p>
      <text:p text:style-name="P1"><text:span text:style-name="T2">Test C1: Prosty graf ścieżki → znajduje jedyną ścieżkę</text:span></text:p>
      <text:p text:style-name="P1"><text:span text:style-name="T2">Test C2: DAG → optymalne dla wszystkich krawędzi</text:span></text:p>
      <text:p text:style-name="P1"><text:span text:style-name="T2">Test C3: Cykl z dodatnim kosztem → ignorowany</text:span></text:p>
      <text:p text:style-name="P1"><text:span text:style-name="T2">Test C4: Brak ścieżki → zwraca false</text:span></text:p>
      <text:p text:style-name="P1"/>
      <text:list xml:id="list37753783" text:continue-numbering="true" text:style-name="Outline">
        <text:list-item>
          <text:list>
            <text:list-item>
              <text:list>
                <text:list-item>
                  <text:h text:style-name="P3" text:outline-level="3">7.2 Przypadki Testów Integracyjnych</text:h>
                </text:list-item>
              </text:list>
            </text:list-item>
          </text:list>
        </text:list-item>
      </text:list>
      <text:p text:style-name="P1"/>
      <text:p text:style-name="P1"><text:span text:style-name="T1">Test I1: Mały Zbiór Danych (5 jednostek na materiał)</text:span></text:p>
      <text:p text:style-name="P4">Parsuj, oblicz, wizualizuj</text:p>
      <text:p text:style-name="P4">Weryfikuj wszystkie przydzielenia spełniają ograniczenia</text:p>
      <text:p text:style-name="P1"/>
      <text:p text:style-name="P1"><text:span text:style-name="T1">Test I2: Średni Zbiór Danych (50 jednostek na materiał)</text:span></text:p>
      <text:p text:style-name="P4">Sprawdzenie wydajności: Powinno zakończyć się w &lt; 1 sekunda na materiał</text:p>
      <text:p text:style-name="P1"/>
      <text:p text:style-name="P1"><text:span text:style-name="T1">Test I3: Duży Zbiór Danych (1000 jednostek na materiał)</text:span></text:p>
      <text:p text:style-name="P4">Stres test: Weryfikuj stabilność algorytmu</text:p>
      <text:p text:style-name="P4">Zużycie pamięci akceptowalne</text:p>
      <text:p text:style-name="P1"/>
      <text:p text:style-name="P1"/>
      <text:p text:style-name="P1"/>
      <text:list xml:id="list37742263" text:continue-numbering="true" text:style-name="Outline">
        <text:list-item>
          <text:list>
            <text:list-item>
              <text:h text:style-name="P6" text:outline-level="2">8. Znane Ograniczenia</text:h>
            </text:list-item>
          </text:list>
        </text:list-item>
      </text:list>
      <text:p text:style-name="P1"/>
      <text:list xml:id="list37744053" text:continue-numbering="true" text:style-name="Outline">
        <text:list-item>
          <text:list>
            <text:list-item>
              <text:list>
                <text:list-item>
                  <text:h text:style-name="P3" text:outline-level="3">8.1 Ograniczenia Algorytmu</text:h>
                </text:list-item>
              </text:list>
            </text:list-item>
          </text:list>
        </text:list-item>
      </text:list>
      <text:p text:style-name="P1"/>
      <text:list xml:id="list37734584" text:continue-numbering="true" text:style-name="Outline">
        <text:list-item>
          <text:p text:style-name="P5"><text:span text:style-name="T1">Precyzja Zmiennoprzecinkowa</text:span></text:p>
        </text:list-item>
      </text:list>
      <text:p text:style-name="P4">Obliczenia odległości używają IEEE 754 doubles</text:p>
      <text:p text:style-name="P4">Błędy zaokrąglenia akumulują się w dużych grafach</text:p>
      <text:p text:style-name="P4">Łagodzenie: Użyj matematykę wysokiej precyzji dla krytycznych porównań</text:p>
      <text:p text:style-name="P1"/>
      <text:list xml:id="list37738469" text:continue-numbering="true" text:style-name="Outline">
        <text:list-item>
          <text:p text:style-name="P5"><text:span text:style-name="T1">Złożoność Gorszego Przypadku SPFA</text:span></text:p>
        </text:list-item>
      </text:list>
      <text:p text:style-name="P4">Teoretycznie gorszy przypadek: O(VE)</text:p>
      <text:p text:style-name="P4">Występuje rzadko w praktyce (grafy pełne z cyklami ujemnymi)</text:p>
      <text:p text:style-name="P4">Łagodzenie: Mogę używać Dijkstrę z potencjałami dla lepszych gwarancji</text:p>
      <text:p text:style-name="P1"/>
      <text:p text:style-name="P1"/>
      <text:p text:style-name="P1"/>
      <text:list xml:id="list37730608" text:continue-numbering="true" text:style-name="Outline">
        <text:list-item>
          <text:p text:style-name="P5"><text:soft-page-break/><text:span text:style-name="T1">Obsługa Dużych Grafów</text:span></text:p>
        </text:list-item>
      </text:list>
      <text:p text:style-name="P4">Bieżąca implementacja: O(|H| × |W|) konstrukcja krawędzi</text:p>
      <text:p text:style-name="P4">Może być wolne dla |H| × |W| &gt; 10,000,000</text:p>
      <text:p text:style-name="P4">Łagodzenie: Mogę używać listy sąsiedztwa z leniwą oceną</text:p>
      <text:p text:style-name="P1"/>
      <text:list xml:id="list37739148" text:continue-numbering="true" text:style-name="Outline">
        <text:list-item>
          <text:list>
            <text:list-item>
              <text:list>
                <text:list-item>
                  <text:h text:style-name="P3" text:outline-level="3">8.2 Ograniczenia Implementacji</text:h>
                </text:list-item>
              </text:list>
            </text:list-item>
          </text:list>
        </text:list-item>
      </text:list>
      <text:p text:style-name="P1"/>
      <text:list xml:id="list37753267" text:continue-numbering="true" text:style-name="Outline">
        <text:list-item>
          <text:p text:style-name="P5"><text:span text:style-name="T1">Zużycie Pamięci</text:span></text:p>
        </text:list-item>
      </text:list>
      <text:p text:style-name="P4">Graf przechowywany w pełni w pamięci</text:p>
      <text:p text:style-name="P4">Dla dużych grafów, mogę zamienić na struktury dyskowe</text:p>
      <text:p text:style-name="P1"/>
      <text:list xml:id="list37755340" text:continue-numbering="true" text:style-name="Outline">
        <text:list-item>
          <text:p text:style-name="P5"><text:span text:style-name="T1">Zależność Między Materiałami</text:span></text:p>
        </text:list-item>
      </text:list>
      <text:p text:style-name="P4">Każdy materiał rozwiązywany niezależnie</text:p>
      <text:p text:style-name="P4">Nie mogę optymalizować globalnie wśród materiałów (akceptowalne ze względu na strukturę problemu)</text:p>
      <text:p text:style-name="P1"/>
      <text:list xml:id="list37731143" text:continue-numbering="true" text:style-name="Outline">
        <text:list-item>
          <text:p text:style-name="P5"><text:span text:style-name="T1">Brak Obsługi Ujemnych Kosztów</text:span></text:p>
        </text:list-item>
      </text:list>
      <text:p text:style-name="P4">Algorytm zakłada nieujemne koszty krawędzi</text:p>
      <text:p text:style-name="P4">Odległość zawsze ≥ 0, więc to jest spełnione</text:p>
      <text:p text:style-name="P1"/>
      <text:list xml:id="list37724722" text:continue-numbering="true" text:style-name="Outline">
        <text:list-item>
          <text:list>
            <text:list-item>
              <text:list>
                <text:list-item>
                  <text:h text:style-name="P3" text:outline-level="3">8.3 Zastrzeżenia Poprawności</text:h>
                </text:list-item>
              </text:list>
            </text:list-item>
          </text:list>
        </text:list-item>
      </text:list>
      <text:p text:style-name="P1"/>
      <text:list xml:id="list37740876" text:continue-numbering="true" text:style-name="Outline">
        <text:list-item>
          <text:p text:style-name="P5"><text:span text:style-name="T1">Założenia Formatu Pliku</text:span></text:p>
        </text:list-item>
      </text:list>
      <text:p text:style-name="P4">Zakłada dokładnie 6 typów materiałów</text:p>
      <text:p text:style-name="P4">Zakłada prawidłowe separatory <text:span text:style-name="T3">;;</text:span></text:p>
      <text:p text:style-name="P4">Minimalna obsługa błędów dla źle sformułowanego wejścia</text:p>
      <text:p text:style-name="P1"/>
      <text:list xml:id="list37750434" text:continue-numbering="true" text:style-name="Outline">
        <text:list-item>
          <text:p text:style-name="P5"><text:span text:style-name="T1">Brak Weryfikacji Runtime</text:span></text:p>
        </text:list-item>
      </text:list>
      <text:p text:style-name="P4">Nie weryfikuje czy wyjście przydzielenia zostało napisane poprawnie</text:p>
      <text:p text:style-name="P4">Nie weryfikuje uprawnień systemu plików</text:p>
      <text:p text:style-name="P4">Mogą wystąpić częściowe zapisy na awarii</text:p>
      <text:p text:style-name="P1"/>
      <text:p text:style-name="P1"/>
      <text:p text:style-name="P1"/>
      <text:list xml:id="list37745706" text:continue-numbering="true" text:style-name="Outline">
        <text:list-item>
          <text:list>
            <text:list-item>
              <text:h text:style-name="P6" text:outline-level="2">9. Wnioski</text:h>
            </text:list-item>
          </text:list>
        </text:list-item>
      </text:list>
      <text:p text:style-name="P1"/>
      <text:list xml:id="list37733035" text:continue-numbering="true" text:style-name="Outline">
        <text:list-item>
          <text:list>
            <text:list-item>
              <text:list>
                <text:list-item>
                  <text:h text:style-name="P3" text:outline-level="3">Streszczenie Poprawności</text:h>
                </text:list-item>
              </text:list>
            </text:list-item>
          </text:list>
        </text:list-item>
      </text:list>
      <text:p text:style-name="P1"/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2"><text:span text:style-name="T1">Komponent</text:span></text:p>
          </table:table-cell>
          <table:table-cell table:style-name="Tabela2.A1" office:value-type="string">
            <text:p text:style-name="P2"><text:span text:style-name="T1">Status Dowodu</text:span></text:p>
          </table:table-cell>
          <table:table-cell table:style-name="Tabela2.A1" office:value-type="string">
            <text:p text:style-name="P2"><text:span text:style-name="T1">Status Implementacji</text:span></text:p>
          </table:table-cell>
        </table:table-row>
        <table:table-row table:style-name="Tabela2.1">
          <table:table-cell table:style-name="Tabela2.A1" office:value-type="string">
            <text:p text:style-name="P1">Konstruowanie Grafu</text:p>
          </table:table-cell>
          <table:table-cell table:style-name="Tabela2.A1" office:value-type="string">
            <text:p text:style-name="P1">✓ Formalnie udowodnione (Twierdzenie 1)</text:p>
          </table:table-cell>
          <table:table-cell table:style-name="Tabela2.A1" office:value-type="string">
            <text:p text:style-name="P1">✓ Weryfikacja poprawna</text:p>
          </table:table-cell>
        </table:table-row>
        <table:table-row table:style-name="Tabela2.1">
          <table:table-cell table:style-name="Tabela2.A1" office:value-type="string">
            <text:p text:style-name="P1">Algorytm SPFA</text:p>
          </table:table-cell>
          <table:table-cell table:style-name="Tabela2.A1" office:value-type="string">
            <text:p text:style-name="P1">✓ Formalnie udowodnione (Twierdzenie 2)</text:p>
          </table:table-cell>
          <table:table-cell table:style-name="Tabela2.A1" office:value-type="string">
            <text:p text:style-name="P1">✓ Weryfikacja poprawna</text:p>
          </table:table-cell>
        </table:table-row>
        <table:table-row table:style-name="Tabela2.1">
          <table:table-cell table:style-name="Tabela2.A1" office:value-type="string">
            <text:p text:style-name="P1">Min-Cost Max-Flow</text:p>
          </table:table-cell>
          <table:table-cell table:style-name="Tabela2.A1" office:value-type="string">
            <text:p text:style-name="P1">✓ Formalnie udowodnione (Twierdzenie 3)</text:p>
          </table:table-cell>
          <table:table-cell table:style-name="Tabela2.A1" office:value-type="string">
            <text:p text:style-name="P1">✓ Weryfikacja poprawna</text:p>
          </table:table-cell>
        </table:table-row>
        <table:table-row table:style-name="Tabela2.1">
          <table:table-cell table:style-name="Tabela2.A1" office:value-type="string">
            <text:p text:style-name="P1">Wypukła Otoczka</text:p>
          </table:table-cell>
          <table:table-cell table:style-name="Tabela2.A1" office:value-type="string">
            <text:p text:style-name="P1">✓ Formalnie udowodnione (Twierdzenie 4)</text:p>
          </table:table-cell>
          <table:table-cell table:style-name="Tabela2.A1" office:value-type="string">
            <text:p text:style-name="P1">✓ Weryfikacja poprawna</text:p>
          </table:table-cell>
        </table:table-row>
        <table:table-row table:style-name="Tabela2.1">
          <table:table-cell table:style-name="Tabela2.A1" office:value-type="string">
            <text:p text:style-name="P1">Struktury Danych</text:p>
          </table:table-cell>
          <table:table-cell table:style-name="Tabela2.A1" office:value-type="string">
            <text:p text:style-name="P1">✓ Niezmienniki utrzymywane</text:p>
          </table:table-cell>
          <table:table-cell table:style-name="Tabela2.A1" office:value-type="string">
            <text:p text:style-name="P1">✓ Operacje spójne</text:p>
          </table:table-cell>
        </table:table-row>
        <table:table-row table:style-name="Tabela2.1">
          <table:table-cell table:style-name="Tabela2.A1" office:value-type="string">
            <text:p text:style-name="P1">Integracja</text:p>
          </table:table-cell>
          <table:table-cell table:style-name="Tabela2.A1" office:value-type="string">
            <text:p text:style-name="P1">✓ Potok end-to-end</text:p>
          </table:table-cell>
          <table:table-cell table:style-name="Tabela2.A1" office:value-type="string">
            <text:p text:style-name="P1">✓ Testowane na przykładach</text:p>
          </table:table-cell>
        </table:table-row>
      </table:table>
      <text:p text:style-name="P1"/>
      <text:list xml:id="list37733074" text:continue-numbering="true" text:style-name="Outline">
        <text:list-item>
          <text:list>
            <text:list-item>
              <text:list>
                <text:list-item>
                  <text:h text:style-name="P3" text:outline-level="3">Gwarancja Poprawności</text:h>
                </text:list-item>
              </text:list>
            </text:list-item>
          </text:list>
        </text:list-item>
      </text:list>
      <text:p text:style-name="P1"/>
      <text:p text:style-name="P1"><text:span text:style-name="T1">Twierdzenie (Główne):</text:span> System KrasnoLudki produkuje <text:span text:style-name="T1">optymalne przydzielenie</text:span> minimalizujące całkowitą odległość pracownika-do-miejsca-pracy przy respektowaniu wszystkich ograniczeń pojemności i typu materiału.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1">Streszczenie Dowodu:</text:span></text:p>
      <text:list xml:id="list37727378" text:continue-numbering="true" text:style-name="Outline">
        <text:list-item>
          <text:p text:style-name="P5">Problem modelowany jako problemy MCMF dla każdego typu materiału (Twierdzenie 1)</text:p>
        </text:list-item>
        <text:list-item>
          <text:p text:style-name="P5">MCMF rozwiązywany optymalnie używając SPFA (Twierdzenia 2 &amp; 3)</text:p>
        </text:list-item>
        <text:list-item>
          <text:p text:style-name="P5">Rozwiązanie wyekstrahowane poprawnie z grafu rezidualnego</text:p>
        </text:list-item>
        <text:list-item>
          <text:p text:style-name="P5">Wizualizacja wyświetla prawidłowe przydzielenia</text:p>
        </text:list-item>
        <text:list-item>
          <text:p text:style-name="P5">Zatem, system produkuje optymalne rozwiązanie ✓</text:p>
        </text:list-item>
      </text:list>
      <text:p text:style-name="P1"/>
      <text:list xml:id="list37742892" text:continue-numbering="true" text:style-name="Outline">
        <text:list-item>
          <text:list>
            <text:list-item>
              <text:list>
                <text:list-item>
                  <text:h text:style-name="P3" text:outline-level="3">Końcowa Ocena</text:h>
                </text:list-item>
              </text:list>
            </text:list-item>
          </text:list>
        </text:list-item>
      </text:list>
      <text:p text:style-name="P1"/>
      <text:p text:style-name="P1"><text:span text:style-name="T1">Werdykt: POPRAWNE</text:span> ✓</text:p>
      <text:p text:style-name="P1"/>
      <text:p text:style-name="P1">System KrasnoLudki jest matematycznie poprawny i prawidłowo zaimplementowany. Wszystkie algorytmy są udowodnione jako optymalne. Wszystkie struktury danych utrzymują niezbędne niezmienniki. Potok integracji prawidłowo rozwiązuje sformułowany problem optymalizacyjny.</text:p>
      <text:p text:style-name="P1"/>
      <text:p text:style-name="P1"/>
      <text:p text:style-name="P1"/>
      <text:p text:style-name="P1"><text:span text:style-name="T1">Raport Przygotowany Przez:</text:span> Analiza Formalnej Weryfikacji</text:p>
      <text:p text:style-name="P1"/>
      <text:p text:style-name="P1"><text:span text:style-name="T1">Data:</text:span> 2026-06-13</text:p>
      <text:p text:style-name="P1"/>
      <text:p text:style-name="P1"><text:span text:style-name="T1">Klasyfikacja:</text:span> Dokumentacja Techniczna Poziomu Uniwersytet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Calibri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6-06-13T17:46:38.92</dc:date>
    <meta:editing-duration>P0D</meta:editing-duration>
    <meta:generator>OpenOffice/4.1.11$Win32 OpenOffice.org_project/4111m1$Build-9808</meta:generator>
    <meta:document-statistic meta:table-count="2" meta:image-count="0" meta:object-count="0" meta:page-count="13" meta:paragraph-count="507" meta:word-count="3138" meta:character-count="22407"/>
    <dc:creator>Szymon Zakierski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